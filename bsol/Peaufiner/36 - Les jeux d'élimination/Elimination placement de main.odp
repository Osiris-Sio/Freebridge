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62.svm"/>
  <manifest:file-entry manifest:media-type="" manifest:full-path="Pictures/TablePreview89.svm"/>
  <manifest:file-entry manifest:media-type="" manifest:full-path="Pictures/TablePreview32.svm"/>
  <manifest:file-entry manifest:media-type="" manifest:full-path="Pictures/TablePreview59.svm"/>
  <manifest:file-entry manifest:media-type="" manifest:full-path="Pictures/2000002E000032B50000204EF7203B87.wmf"/>
  <manifest:file-entry manifest:media-type="" manifest:full-path="Pictures/TablePreview8.svm"/>
  <manifest:file-entry manifest:media-type="" manifest:full-path="Pictures/TablePreview29.svm"/>
  <manifest:file-entry manifest:media-type="" manifest:full-path="Pictures/TablePreview66.svm"/>
  <manifest:file-entry manifest:media-type="" manifest:full-path="Pictures/TablePreview36.svm"/>
  <manifest:file-entry manifest:media-type="" manifest:full-path="Pictures/TablePreview73.svm"/>
  <manifest:file-entry manifest:media-type="" manifest:full-path="Pictures/TablePreview43.svm"/>
  <manifest:file-entry manifest:media-type="" manifest:full-path="Pictures/TablePreview80.svm"/>
  <manifest:file-entry manifest:media-type="" manifest:full-path="Pictures/TablePreview13.svm"/>
  <manifest:file-entry manifest:media-type="" manifest:full-path="Pictures/TablePreview50.svm"/>
  <manifest:file-entry manifest:media-type="" manifest:full-path="Pictures/TablePreview77.svm"/>
  <manifest:file-entry manifest:media-type="" manifest:full-path="Pictures/TablePreview20.svm"/>
  <manifest:file-entry manifest:media-type="" manifest:full-path="Pictures/TablePreview47.svm"/>
  <manifest:file-entry manifest:media-type="" manifest:full-path="Pictures/TablePreview84.svm"/>
  <manifest:file-entry manifest:media-type="" manifest:full-path="Pictures/TablePreview17.svm"/>
  <manifest:file-entry manifest:media-type="" manifest:full-path="Pictures/TablePreview54.svm"/>
  <manifest:file-entry manifest:media-type="" manifest:full-path="Pictures/TablePreview3.svm"/>
  <manifest:file-entry manifest:media-type="" manifest:full-path="Pictures/TablePreview24.svm"/>
  <manifest:file-entry manifest:media-type="" manifest:full-path="Pictures/TablePreview61.svm"/>
  <manifest:file-entry manifest:media-type="" manifest:full-path="Pictures/TablePreview88.svm"/>
  <manifest:file-entry manifest:media-type="" manifest:full-path="Pictures/TablePreview31.svm"/>
  <manifest:file-entry manifest:media-type="" manifest:full-path="Pictures/TablePreview58.svm"/>
  <manifest:file-entry manifest:media-type="" manifest:full-path="Pictures/TablePreview7.svm"/>
  <manifest:file-entry manifest:media-type="" manifest:full-path="Pictures/TablePreview28.svm"/>
  <manifest:file-entry manifest:media-type="" manifest:full-path="Pictures/TablePreview65.svm"/>
  <manifest:file-entry manifest:media-type="" manifest:full-path="Pictures/TablePreview35.svm"/>
  <manifest:file-entry manifest:media-type="" manifest:full-path="Pictures/TablePreview72.svm"/>
  <manifest:file-entry manifest:media-type="" manifest:full-path="Pictures/TablePreview42.svm"/>
  <manifest:file-entry manifest:media-type="" manifest:full-path="Pictures/TablePreview69.svm"/>
  <manifest:file-entry manifest:media-type="" manifest:full-path="Pictures/TablePreview12.svm"/>
  <manifest:file-entry manifest:media-type="" manifest:full-path="Pictures/TablePreview39.svm"/>
  <manifest:file-entry manifest:media-type="" manifest:full-path="Pictures/TablePreview76.svm"/>
  <manifest:file-entry manifest:media-type="" manifest:full-path="Pictures/TablePreview46.svm"/>
  <manifest:file-entry manifest:media-type="" manifest:full-path="Pictures/TablePreview83.svm"/>
  <manifest:file-entry manifest:media-type="" manifest:full-path="Pictures/TablePreview16.svm"/>
  <manifest:file-entry manifest:media-type="" manifest:full-path="Pictures/TablePreview53.svm"/>
  <manifest:file-entry manifest:media-type="" manifest:full-path="Pictures/TablePreview90.svm"/>
  <manifest:file-entry manifest:media-type="" manifest:full-path="Pictures/TablePreview2.svm"/>
  <manifest:file-entry manifest:media-type="" manifest:full-path="Pictures/TablePreview23.svm"/>
  <manifest:file-entry manifest:media-type="" manifest:full-path="Pictures/TablePreview60.svm"/>
  <manifest:file-entry manifest:media-type="" manifest:full-path="Pictures/TablePreview87.svm"/>
  <manifest:file-entry manifest:media-type="" manifest:full-path="Pictures/TablePreview30.svm"/>
  <manifest:file-entry manifest:media-type="" manifest:full-path="Pictures/TablePreview57.svm"/>
  <manifest:file-entry manifest:media-type="" manifest:full-path="Pictures/TablePreview6.svm"/>
  <manifest:file-entry manifest:media-type="" manifest:full-path="Pictures/TablePreview27.svm"/>
  <manifest:file-entry manifest:media-type="" manifest:full-path="Pictures/TablePreview64.svm"/>
  <manifest:file-entry manifest:media-type="" manifest:full-path="Pictures/TablePreview34.svm"/>
  <manifest:file-entry manifest:media-type="" manifest:full-path="Pictures/TablePreview71.svm"/>
  <manifest:file-entry manifest:media-type="" manifest:full-path="Pictures/TablePreview41.svm"/>
  <manifest:file-entry manifest:media-type="" manifest:full-path="Pictures/TablePreview68.svm"/>
  <manifest:file-entry manifest:media-type="" manifest:full-path="Pictures/TablePreview11.svm"/>
  <manifest:file-entry manifest:media-type="" manifest:full-path="Pictures/TablePreview38.svm"/>
  <manifest:file-entry manifest:media-type="" manifest:full-path="Pictures/TablePreview75.svm"/>
  <manifest:file-entry manifest:media-type="" manifest:full-path="Pictures/TablePreview45.svm"/>
  <manifest:file-entry manifest:media-type="" manifest:full-path="Pictures/TablePreview82.svm"/>
  <manifest:file-entry manifest:media-type="" manifest:full-path="Pictures/TablePreview15.svm"/>
  <manifest:file-entry manifest:media-type="" manifest:full-path="Pictures/TablePreview52.svm"/>
  <manifest:file-entry manifest:media-type="" manifest:full-path="Pictures/TablePreview79.svm"/>
  <manifest:file-entry manifest:media-type="" manifest:full-path="Pictures/TablePreview1.svm"/>
  <manifest:file-entry manifest:media-type="" manifest:full-path="Pictures/TablePreview22.svm"/>
  <manifest:file-entry manifest:media-type="" manifest:full-path="Pictures/TablePreview49.svm"/>
  <manifest:file-entry manifest:media-type="" manifest:full-path="Pictures/TablePreview86.svm"/>
  <manifest:file-entry manifest:media-type="" manifest:full-path="Pictures/TablePreview19.svm"/>
  <manifest:file-entry manifest:media-type="" manifest:full-path="Pictures/TablePreview56.svm"/>
  <manifest:file-entry manifest:media-type="" manifest:full-path="Pictures/TablePreview5.svm"/>
  <manifest:file-entry manifest:media-type="" manifest:full-path="Pictures/TablePreview26.svm"/>
  <manifest:file-entry manifest:media-type="" manifest:full-path="Pictures/TablePreview63.svm"/>
  <manifest:file-entry manifest:media-type="" manifest:full-path="Pictures/TablePreview33.svm"/>
  <manifest:file-entry manifest:media-type="" manifest:full-path="Pictures/TablePreview70.svm"/>
  <manifest:file-entry manifest:media-type="" manifest:full-path="Pictures/TablePreview40.svm"/>
  <manifest:file-entry manifest:media-type="" manifest:full-path="Pictures/TablePreview9.svm"/>
  <manifest:file-entry manifest:media-type="" manifest:full-path="Pictures/TablePreview67.svm"/>
  <manifest:file-entry manifest:media-type="" manifest:full-path="Pictures/TablePreview10.svm"/>
  <manifest:file-entry manifest:media-type="" manifest:full-path="Pictures/TablePreview37.svm"/>
  <manifest:file-entry manifest:media-type="" manifest:full-path="Pictures/TablePreview74.svm"/>
  <manifest:file-entry manifest:media-type="" manifest:full-path="Pictures/TablePreview44.svm"/>
  <manifest:file-entry manifest:media-type="" manifest:full-path="Pictures/TablePreview81.svm"/>
  <manifest:file-entry manifest:media-type="" manifest:full-path="Pictures/TablePreview14.svm"/>
  <manifest:file-entry manifest:media-type="" manifest:full-path="Pictures/TablePreview51.svm"/>
  <manifest:file-entry manifest:media-type="" manifest:full-path="Pictures/TablePreview78.svm"/>
  <manifest:file-entry manifest:media-type="" manifest:full-path="Pictures/TablePreview21.svm"/>
  <manifest:file-entry manifest:media-type="" manifest:full-path="Pictures/TablePreview48.svm"/>
  <manifest:file-entry manifest:media-type="" manifest:full-path="Pictures/TablePreview85.svm"/>
  <manifest:file-entry manifest:media-type="" manifest:full-path="Pictures/TablePreview18.svm"/>
  <manifest:file-entry manifest:media-type="" manifest:full-path="Pictures/TablePreview55.svm"/>
  <manifest:file-entry manifest:media-type="" manifest:full-path="Pictures/TablePreview4.svm"/>
  <manifest:file-entry manifest:media-type="" manifest:full-path="Pictures/TablePreview25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1-notes">
      <style:graphic-properties draw:fill-color="#ffffff" fo:min-height="13.364cm"/>
    </style:style>
    <style:style style:name="co1" style:family="table-column">
      <style:table-column-properties style:column-width="5.065cm" style:use-optimal-column-width="false"/>
    </style:style>
    <style:style style:name="co2" style:family="table-column">
      <style:table-column-properties style:column-width="11.8cm" style:use-optimal-column-width="false"/>
    </style:style>
    <style:style style:name="co3" style:family="table-column">
      <style:table-column-properties style:column-width="11.833cm" style:use-optimal-column-width="false"/>
    </style:style>
    <style:style style:name="co4" style:family="table-column">
      <style:table-column-properties style:column-width="12.8cm" style:use-optimal-column-width="false"/>
    </style:style>
    <style:style style:name="co5" style:family="table-column">
      <style:table-column-properties style:column-width="12.2cm" style:use-optimal-column-width="false"/>
    </style:style>
    <style:style style:name="co6" style:family="table-column">
      <style:table-column-properties style:column-width="1.6cm" style:use-optimal-column-width="false"/>
    </style:style>
    <style:style style:name="co7" style:family="table-column">
      <style:table-column-properties style:column-width="8.4cm" style:use-optimal-column-width="false"/>
    </style:style>
    <style:style style:name="co8" style:family="table-column">
      <style:table-column-properties style:column-width="13.601cm" style:use-optimal-column-width="false"/>
    </style:style>
    <style:style style:name="co9" style:family="table-column">
      <style:table-column-properties style:column-width="15.601cm" style:use-optimal-column-width="false"/>
    </style:style>
    <style:style style:name="co10" style:family="table-column">
      <style:table-column-properties style:column-width="15.201cm" style:use-optimal-column-width="false"/>
    </style:style>
    <style:style style:name="co11" style:family="table-column">
      <style:table-column-properties style:column-width="5.8cm" style:use-optimal-column-width="false"/>
    </style:style>
    <style:style style:name="co12" style:family="table-column">
      <style:table-column-properties style:column-width="13.954cm" style:use-optimal-column-width="false"/>
    </style:style>
    <style:style style:name="co13" style:family="table-column">
      <style:table-column-properties style:column-width="5.6cm" style:use-optimal-column-width="false"/>
    </style:style>
    <style:style style:name="co14" style:family="table-column">
      <style:table-column-properties style:column-width="10.4cm" style:use-optimal-column-width="false"/>
    </style:style>
    <style:style style:name="co15" style:family="table-column">
      <style:table-column-properties style:column-width="6.4cm" style:use-optimal-column-width="false"/>
    </style:style>
    <style:style style:name="co16" style:family="table-column">
      <style:table-column-properties style:column-width="9.4cm" style:use-optimal-column-width="false"/>
    </style:style>
    <style:style style:name="co17" style:family="table-column">
      <style:table-column-properties style:column-width="12cm" style:use-optimal-column-width="false"/>
    </style:style>
    <style:style style:name="co18" style:family="table-column">
      <style:table-column-properties style:column-width="5.991cm" style:use-optimal-column-width="false"/>
    </style:style>
    <style:style style:name="co19" style:family="table-column">
      <style:table-column-properties style:column-width="7.8cm" style:use-optimal-column-width="false"/>
    </style:style>
    <style:style style:name="ro1" style:family="table-row">
      <style:table-row-properties style:row-height="1.033cm"/>
    </style:style>
    <style:style style:name="ro2" style:family="table-row">
      <style:table-row-properties style:row-height="1.011cm"/>
    </style:style>
    <style:style style:name="ro3" style:family="table-row">
      <style:table-row-properties style:row-height="1.013cm"/>
    </style:style>
    <style:style style:name="ro4" style:family="table-row">
      <style:table-row-properties style:row-height="1.399cm"/>
    </style:style>
    <style:style style:name="ro5" style:family="table-row">
      <style:table-row-properties style:row-height="1.826cm"/>
    </style:style>
    <style:style style:name="ro6" style:family="table-row">
      <style:table-row-properties style:row-height="1.799cm"/>
    </style:style>
    <style:style style:name="ro7" style:family="table-row">
      <style:table-row-properties style:row-height="2.199cm"/>
    </style:style>
    <style:style style:name="ro8" style:family="table-row">
      <style:table-row-properties style:row-height="3.418cm"/>
    </style:style>
    <style:style style:name="ro9" style:family="table-row">
      <style:table-row-properties style:row-height="1.03cm"/>
    </style:style>
    <style:style style:name="ro10" style:family="table-row">
      <style:table-row-properties style:row-height="1.199cm"/>
    </style:style>
    <style:style style:name="ro11" style:family="table-row">
      <style:table-row-properties style:row-height="3.439cm"/>
    </style:style>
    <style:style style:name="ro12" style:family="table-row">
      <style:table-row-properties style:row-height="0.975cm"/>
    </style:style>
    <style:style style:name="ro13" style:family="table-row">
      <style:table-row-properties style:row-height="1.695cm"/>
    </style:style>
    <style:style style:name="ro14" style:family="table-row">
      <style:table-row-properties style:row-height="1.999cm"/>
    </style:style>
    <style:style style:name="ro15" style:family="table-row">
      <style:table-row-properties style:row-height="4.214cm"/>
    </style:style>
    <style:style style:name="ro16" style:family="table-row">
      <style:table-row-properties style:row-height="2.643cm"/>
    </style:style>
    <style:style style:name="ro17" style:family="table-row">
      <style:table-row-properties style:row-height="3.437cm"/>
    </style:style>
    <style:style style:name="ro18" style:family="table-row">
      <style:table-row-properties style:row-height="4.6cm"/>
    </style:style>
    <style:style style:name="ro19" style:family="table-row">
      <style:table-row-properties style:row-height="5.743cm"/>
    </style:style>
    <style:style style:name="ro20" style:family="table-row">
      <style:table-row-properties style:row-height="1.05cm"/>
    </style:style>
    <style:style style:name="ro21" style:family="table-row">
      <style:table-row-properties style:row-height="0.994cm"/>
    </style:style>
    <style:style style:name="ro22" style:family="table-row">
      <style:table-row-properties style:row-height="1.667cm"/>
    </style:style>
    <style:style style:name="ro23" style:family="table-row">
      <style:table-row-properties style:row-height="4.199cm"/>
    </style:style>
    <style:style style:name="ro24" style:family="table-row">
      <style:table-row-properties style:row-height="3.463cm"/>
    </style:style>
    <style:style style:name="ro25" style:family="table-row">
      <style:table-row-properties style:row-height="1.043cm"/>
    </style:style>
    <style:style style:name="ro26" style:family="table-row">
      <style:table-row-properties style:row-height="1.156cm"/>
    </style:style>
    <style:style style:name="ro27" style:family="table-row">
      <style:table-row-properties style:row-height="1.045cm"/>
    </style:style>
    <style:style style:name="ce1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4bac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e6b9b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6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7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8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9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0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5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0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5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0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1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6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9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1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2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3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4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5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0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5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0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5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6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9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1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6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7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8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9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0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5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0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5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0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1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6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9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1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2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3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4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6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9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4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6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9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4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5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0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5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6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7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8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9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3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8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9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3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8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9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4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6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9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0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1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2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6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7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2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6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7" style:family="table-cell">
      <style:graphic-properties draw:fill="solid" draw:fill-color="#ff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2" style:family="table-cell">
      <style:graphic-properties draw:fill="solid" draw:fill-color="#93cdd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225cm" fo:margin-bottom="0cm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10" style:family="text">
      <style:text-properties fo:color="#ffffff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11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1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style:style style:name="T13" style:family="text">
      <style:text-properties fo:color="#17375e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17375e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ffffff" style:text-line-through-style="none" fo:font-family="Calibri" fo:font-size="18pt" fo:letter-spacing="normal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7375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7375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99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A">
        <style:list-level-properties text:space-before="0.001cm" text:min-label-width="1.269cm"/>
        <style:text-properties fo:color="#17375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A">
        <style:list-level-properties text:space-before="0.001cm" text:min-label-width="1.269cm"/>
        <style:text-properties fo:color="#17375e" fo:font-size="45%"/>
      </text:list-level-style-number>
      <text:list-level-style-bullet text:level="2" text:bullet-char="-">
        <style:list-level-properties text:space-before="1.271cm" text:min-label-width="0.952cm"/>
        <style:text-properties fo:font-family="StarSymbol" fo:color="#17375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A">
        <style:list-level-properties text:space-before="0.001cm" text:min-label-width="1.269cm"/>
        <style:text-properties fo:color="#17375e" fo:font-size="45%"/>
      </text:list-level-style-number>
      <text:list-level-style-bullet text:level="2" text:bullet-char="-">
        <style:list-level-properties text:space-before="1.271cm" text:min-label-width="0.952cm"/>
        <style:text-properties fo:font-family="StarSymbol" fo:color="#17375e" fo:font-size="45%"/>
      </text:list-level-style-bullet>
      <text:list-level-style-bullet text:level="3" text:bullet-char="-">
        <style:list-level-properties text:space-before="2.541cm" text:min-label-width="0.952cm"/>
        <style:text-properties fo:font-family="StarSymbol" fo:color="#17375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2" presentation:style-name="pr2" draw:text-style-name="P2" draw:layer="layout" svg:width="17.601cm" svg:height="4.399cm" svg:x="3.899cm" svg:y="6.725cm" presentation:class="subtitle" presentation:user-transformed="true">
          <draw:text-box>
            <text:p text:style-name="P1"><text:span text:style-name="T2">Cours de Jean-Michel Héthuin</text:span></text:p>
            <text:p text:style-name="P1"><text:span text:style-name="T2"/></text:p>
            <text:p text:style-name="P1"><text:span text:style-name="T2">Mis en forme Power Point par </text:span></text:p>
            <text:p text:style-name="P1"><text:span text:style-name="T2">Gérard Mairesse</text:span></text:p>
          </draw:text-box>
        </draw:frame>
        <draw:frame draw:name="Espace réservé du pied de page 3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name="Espace réservé de l'image des diapositives 1" draw:style-name="gr1" draw:layer="layout" svg:width="11.429cm" svg:height="8.572cm" svg:x="3.81cm" svg:y="3.175cm" draw:page-number="1" presentation:class="page"/>
          <draw:frame draw:name="Espace réservé des commentaires 2" presentation:style-name="pr4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5" draw:text-style-name="P5" draw:layer="layout" svg:width="8.254cm" svg:height="1.273cm" svg:x="10.791cm" svg:y="24.126cm" presentation:class="page-number" presentation:user-transformed="true">
            <draw:text-box>
              <text:p text:style-name="P3"><text:span text:style-name="T4"><text:page-number>&lt;numéro&gt;</text:page-number></text:span></text:p>
            </draw:text-box>
          </draw:frame>
        </presentation:notes>
      </draw:page>
      <draw:page draw:name="page2" draw:style-name="dp3" draw:master-page-name="Standard" presentation:presentation-page-layout-name="AL1T0">
        <draw:frame draw:name="Titre 1" presentation:style-name="pr1" draw:text-style-name="P2" draw:layer="layout" svg:width="21.401cm" svg:height="2.999cm" svg:x="2.099cm" svg:y="1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2" presentation:style-name="pr2" draw:text-style-name="P2" draw:layer="layout" svg:width="23.802cm" svg:height="11.4cm" svg:x="1.078cm" svg:y="5.525cm" presentation:class="subtitle" presentation:user-transformed="true">
          <draw:text-box>
            <text:p xml:id="id2" text:id="id2" text:style-name="P6"><text:span text:style-name="T5">Dans les contrats à l’atout il existe 3 principaux plans de jeu :</text:span></text:p>
            <text:p xml:id="id3" text:id="id3" text:style-name="P6"><text:span text:style-name="T5"><text:tab/></text:span><text:span text:style-name="T5">Les jeux de coupe</text:span></text:p>
            <text:p xml:id="id4" text:id="id4" text:style-name="P6"><text:span text:style-name="T5"><text:tab/></text:span><text:span text:style-name="T5">Les jeux d’affranchissement </text:span></text:p>
            <text:p xml:id="id5" text:id="id5" text:style-name="P6"><text:span text:style-name="T5"><text:tab/></text:span><text:span text:style-name="T5">Les jeux d’honneurs</text:span></text:p>
          </draw:text-box>
        </draw:frame>
        <draw:custom-shape draw:name="Sous-titre 2" draw:style-name="gr2" draw:text-style-name="P2" xml:id="id6" draw:id="id6" draw:layer="layout" svg:width="23.802cm" svg:height="4.399cm" svg:x="1.078cm" svg:y="11.525cm">
          <text:p text:style-name="P7"><text:span text:style-name="T5">Afin d’éviter les impasses successives pour réaliser son contrat, un bon déclarant <text:s/>cherchera des astuces obligeant les adversaires à jouer les couleurs à risques : l’élimination placement de main est un moyen </text:span></text:p>
          <draw:enhanced-geometry svg:viewBox="0 0 21600 21600" draw:type="rectangle" draw:enhanced-path="M 0 0 L 21600 0 21600 21600 0 21600 0 0 Z N"/>
        </draw:custom-shape>
        <draw:frame draw:name="Espace réservé du pied de page 4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" anim:sub-item="" smil:attributeName="visibility" smil:to="visible"/>
                  <anim:transitionFilter smil:dur="1s" smil:targetElement="id6" anim:sub-item="" smil:type="fade" smil:subtype="crossfade"/>
                  <anim:animate smil:dur="1s" smil:fill="hold" smil:targetElement="id6" anim:sub-item="" smil:attributeName="x" smil:values="x;x" smil:keyTimes="0;1"/>
                  <anim:animate smil:dur="1s" smil:fill="hold" smil:targetElement="id6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924cm" presentation:class="subtitle" presentation:user-transformed="true">
          <draw:text-box>
            <text:p xml:id="id7" text:id="id7" text:style-name="P6"><text:span text:style-name="T6">1) PRINCIPES DU JEU D’ELIMINATION :</text:span></text:p>
            <text:p xml:id="id8" text:id="id8" text:style-name="P6"><text:span text:style-name="T7"><text:tab/></text:span><text:span text:style-name="T7">a) Il faut se débarrasser de toutes les couleurs neutres</text:span></text:p>
            <text:p xml:id="id9" text:id="id9" text:style-name="P6"><text:span text:style-name="T7"><text:tab/></text:span><text:span text:style-name="T7">b) Faire tomber les atouts pour qu’il en reste un nombre suffisant dans les 2 mains</text:span></text:p>
            <text:p xml:id="id10" text:id="id10" text:style-name="P6"><text:span text:style-name="T7"><text:tab/></text:span><text:span text:style-name="T7">c) Rendre la main à l’adversaire pour qu’il soit obligé de rejouer :</text:span></text:p>
            <text:p xml:id="id11" text:id="id11" text:style-name="P6"><text:span text:style-name="T7"><text:tab/></text:span><text:span text:style-name="T7"><text:tab/></text:span><text:span text:style-name="T7">- soit dans une fourchette ; ce qui vous dispense de faire une impasse</text:span></text:p>
            <text:p xml:id="id12" text:id="id12" text:style-name="P6"><text:span text:style-name="T7"><text:tab/></text:span><text:span text:style-name="T7"><text:tab/></text:span><text:span text:style-name="T7">- soit sous un honneur capital</text:span></text:p>
            <text:p xml:id="id13" text:id="id13" text:style-name="P6"><text:span text:style-name="T7"><text:tab/></text:span><text:span text:style-name="T7"><text:tab/></text:span><text:span text:style-name="T7">- soit, si c’est un contrat à l’atout, « en coupe et défausse ».</text:span></text:p>
            <text:p text:style-name="P6"><text:span text:style-name="T7"/></text:p>
            <text:p xml:id="id14" text:id="id14" text:style-name="P6"><text:span text:style-name="T6">2) CONDITIONS D’APPLICATION : </text:span></text:p>
            <text:p xml:id="id15" text:id="id15" text:style-name="P6"><text:span text:style-name="T7"><text:tab/></text:span><text:span text:style-name="T7">- Aucun autre plan de jeu n’apparait envisageable, il s’agit de mains miroirs (pas de longue ni de courte) avec certaines couleurs faciles à éliminer en défaussant ou en coupant.</text:span></text:p>
            <text:p xml:id="id16" text:id="id16" text:style-name="P6"><text:span text:style-name="T7"><text:tab/></text:span><text:span text:style-name="T7">- Les atouts sont en nombre suffisants pour qu’il y ait une menace de rejouer en coupe et défausse.</text:span></text:p>
            <text:p xml:id="id17" text:id="id17" text:style-name="P6"><text:span text:style-name="T7"><text:tab/></text:span><text:span text:style-name="T7">- Il existe des couleurs qu’il est souhaitable de voir attaquer par les adversaires</text:span></text:p>
            <text:p xml:id="id18" text:id="id18" text:style-name="P6"><text:span text:style-name="T7"><text:tab/></text:span><text:span text:style-name="T7">- Rechercher une façon de donner la main à l’adversaire.</text:span></text:p>
          </draw:text-box>
        </draw:frame>
        <draw:frame draw:name="Espace réservé du pied de page 2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924cm" presentation:class="subtitle" presentation:user-transformed="true">
          <draw:text-box>
            <text:p xml:id="id19" text:id="id19" text:style-name="P1"><text:span text:style-name="T6">EXEMPLE</text:span></text:p>
            <text:p text:style-name="P6"><text:span text:style-name="T7"><text:tab/></text:span></text:p>
          </draw:text-box>
        </draw:frame>
        <draw:frame draw:name="Tableau 7" draw:style-name="standard" xml:id="id20" draw:id="id20" draw:layer="layout" svg:width="5.064cm" svg:height="5.078cm" svg:x="2.699cm" svg:y="5.725cm">
          <table:table>
            <table:table-column table:style-name="co1"/>
            <table:table-row table:style-name="ro1">
              <table:table-cell table:style-name="ce1">
                <text:p text:style-name="P8"><text:span text:style-name="T8">NORD</text:span></text:p>
              </table:table-cell>
            </table:table-row>
            <table:table-row table:style-name="ro2">
              <table:table-cell table:style-name="ce2">
                <text:p text:style-name="P9"><text:span text:style-name="T9">♠ </text:span><text:span text:style-name="T9">D 7 4 2</text:span></text:p>
              </table:table-cell>
            </table:table-row>
            <table:table-row table:style-name="ro2">
              <table:table-cell table:style-name="ce3">
                <text:p text:style-name="P9"><text:span text:style-name="T9">♥ </text:span><text:span text:style-name="T9">R 8 2</text:span></text:p>
              </table:table-cell>
            </table:table-row>
            <table:table-row table:style-name="ro2">
              <table:table-cell table:style-name="ce4">
                <text:p text:style-name="P9"><text:span text:style-name="T9">♦ </text:span><text:span text:style-name="T9">A 5 2</text:span></text:p>
              </table:table-cell>
            </table:table-row>
            <table:table-row table:style-name="ro3">
              <table:table-cell table:style-name="ce5">
                <text:p text:style-name="P9"><text:span text:style-name="T9">♣ </text:span><text:span text:style-name="T9">R V 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au 8" draw:style-name="standard" xml:id="id21" draw:id="id21" draw:layer="layout" svg:width="5.064cm" svg:height="5.078cm" svg:x="2.699cm" svg:y="12.125cm">
          <table:table>
            <table:table-column table:style-name="co1"/>
            <table:table-row table:style-name="ro1">
              <table:table-cell table:style-name="ce6">
                <text:p text:style-name="P8"><text:span text:style-name="T8">SUD</text:span></text:p>
              </table:table-cell>
            </table:table-row>
            <table:table-row table:style-name="ro2">
              <table:table-cell table:style-name="ce7">
                <text:p text:style-name="P9"><text:span text:style-name="T9">♠ </text:span><text:span text:style-name="T9">A R V 6 5</text:span></text:p>
              </table:table-cell>
            </table:table-row>
            <table:table-row table:style-name="ro2">
              <table:table-cell table:style-name="ce8">
                <text:p text:style-name="P9"><text:span text:style-name="T9">♥ </text:span><text:span text:style-name="T9">7 6 2</text:span></text:p>
              </table:table-cell>
            </table:table-row>
            <table:table-row table:style-name="ro2">
              <table:table-cell table:style-name="ce9">
                <text:p text:style-name="P9"><text:span text:style-name="T9">♦ </text:span><text:span text:style-name="T9">R 4 </text:span></text:p>
              </table:table-cell>
            </table:table-row>
            <table:table-row table:style-name="ro3">
              <table:table-cell table:style-name="ce10">
                <text:p text:style-name="P9"><text:span text:style-name="T9">♣ </text:span><text:span text:style-name="T9">A 10 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au 2" draw:style-name="standard" xml:id="id22" draw:id="id22" draw:layer="layout" svg:width="11.799cm" svg:height="1.398cm" svg:x="9.1cm" svg:y="6.525cm">
          <table:table>
            <table:table-column table:style-name="co2"/>
            <table:table-row table:style-name="ro4">
              <table:table-cell table:style-name="ce11">
                <text:p text:style-name="P9"><text:span text:style-name="T8">Sud joue 4 </text:span><text:span text:style-name="T10">♠</text:span><text:span text:style-name="T11"> et reçoit l’entame de la D♦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au 10" draw:style-name="standard" xml:id="id24" draw:id="id24" draw:layer="layout" svg:width="11.832cm" svg:height="1.825cm" svg:x="9.3cm" svg:y="11.525cm">
          <table:table>
            <table:table-column table:style-name="co3"/>
            <table:table-row table:style-name="ro5">
              <table:table-cell table:style-name="ce12">
                <text:p text:style-name="P9"><text:span text:style-name="T8">Après avoir fait tomber les atouts en 2 ou 3 tours Sud joue </text:span><text:span text:style-name="T10">A♦ et ♦ coupé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au 11" draw:style-name="standard" xml:id="id25" draw:id="id25" draw:layer="layout" svg:width="11.832cm" svg:height="1.798cm" svg:x="9.3cm" svg:y="14.526cm">
          <table:table>
            <table:table-column table:style-name="co3"/>
            <table:table-row table:style-name="ro6">
              <table:table-cell table:style-name="ce13">
                <text:p text:style-name="P9"><text:span text:style-name="T8">On arrive à la position suivante :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au 12" draw:style-name="standard" xml:id="id23" draw:id="id23" draw:layer="layout" svg:width="11.799cm" svg:height="1.398cm" svg:x="9.1cm" svg:y="9.125cm">
          <table:table>
            <table:table-column table:style-name="co2"/>
            <table:table-row table:style-name="ro4">
              <table:table-cell table:style-name="ce14">
                <text:p text:style-name="P9"><text:span text:style-name="T8">Il constate qu’il peut perdre 3</text:span><text:span text:style-name="T10">♥</text:span><text:span text:style-name="T12"> et 1</text:span><text:span text:style-name="T10">♣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Espace réservé du pied de page 4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20" anim:sub-item="" smil:attributeName="visibility" smil:to="visible"/>
                  <anim:animate smil:dur="1s" smil:fill="hold" smil:targetElement="id20" anim:sub-item="" smil:attributeName="width" smil:values="0;width" smil:keyTimes="0;1"/>
                  <anim:animate smil:dur="1s" smil:fill="hold" smil:targetElement="id20" anim:sub-item="" smil:attributeName="height" smil:values="0;height" smil:keyTimes="0;1"/>
                  <anim:animate smil:dur="1s" smil:fill="hold" smil:targetElement="id20" anim:sub-item="" smil:attributeName="rotate" smil:values="90;0" smil:keyTimes="0;1"/>
                  <anim:transitionFilter smil:dur="1s" smil:targetElement="id20" anim:sub-item="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21" anim:sub-item="" smil:attributeName="visibility" smil:to="visible"/>
                  <anim:animate smil:dur="1s" smil:fill="hold" smil:targetElement="id21" anim:sub-item="" smil:attributeName="width" smil:values="0;width" smil:keyTimes="0;1"/>
                  <anim:animate smil:dur="1s" smil:fill="hold" smil:targetElement="id21" anim:sub-item="" smil:attributeName="height" smil:values="0;height" smil:keyTimes="0;1"/>
                  <anim:animate smil:dur="1s" smil:fill="hold" smil:targetElement="id21" anim:sub-item="" smil:attributeName="rotate" smil:values="90;0" smil:keyTimes="0;1"/>
                  <anim:transitionFilter smil:dur="1s" smil:targetElement="id21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22" anim:sub-item="" smil:attributeName="visibility" smil:to="visible"/>
                  <anim:animate smil:dur="1s" smil:fill="hold" smil:targetElement="id22" anim:sub-item="" smil:attributeName="width" smil:values="0;width" smil:keyTimes="0;1"/>
                  <anim:animate smil:dur="1s" smil:fill="hold" smil:targetElement="id22" anim:sub-item="" smil:attributeName="height" smil:values="0;height" smil:keyTimes="0;1"/>
                  <anim:animate smil:dur="1s" smil:fill="hold" smil:targetElement="id22" anim:sub-item="" smil:attributeName="rotate" smil:values="90;0" smil:keyTimes="0;1"/>
                  <anim:transitionFilter smil:dur="1s" smil:targetElement="id2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23" anim:sub-item="" smil:attributeName="visibility" smil:to="visible"/>
                  <anim:animate smil:dur="1s" smil:fill="hold" smil:targetElement="id23" anim:sub-item="" smil:attributeName="width" smil:values="0;width" smil:keyTimes="0;1"/>
                  <anim:animate smil:dur="1s" smil:fill="hold" smil:targetElement="id23" anim:sub-item="" smil:attributeName="height" smil:values="0;height" smil:keyTimes="0;1"/>
                  <anim:animate smil:dur="1s" smil:fill="hold" smil:targetElement="id23" anim:sub-item="" smil:attributeName="rotate" smil:values="90;0" smil:keyTimes="0;1"/>
                  <anim:transitionFilter smil:dur="1s" smil:targetElement="id23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24" anim:sub-item="" smil:attributeName="visibility" smil:to="visible"/>
                  <anim:animate smil:dur="1s" smil:fill="hold" smil:targetElement="id24" anim:sub-item="" smil:attributeName="width" smil:values="0;width" smil:keyTimes="0;1"/>
                  <anim:animate smil:dur="1s" smil:fill="hold" smil:targetElement="id24" anim:sub-item="" smil:attributeName="height" smil:values="0;height" smil:keyTimes="0;1"/>
                  <anim:animate smil:dur="1s" smil:fill="hold" smil:targetElement="id24" anim:sub-item="" smil:attributeName="rotate" smil:values="90;0" smil:keyTimes="0;1"/>
                  <anim:transitionFilter smil:dur="1s" smil:targetElement="id24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25" anim:sub-item="" smil:attributeName="visibility" smil:to="visible"/>
                  <anim:animate smil:dur="1s" smil:fill="hold" smil:targetElement="id25" anim:sub-item="" smil:attributeName="width" smil:values="0;width" smil:keyTimes="0;1"/>
                  <anim:animate smil:dur="1s" smil:fill="hold" smil:targetElement="id25" anim:sub-item="" smil:attributeName="height" smil:values="0;height" smil:keyTimes="0;1"/>
                  <anim:animate smil:dur="1s" smil:fill="hold" smil:targetElement="id25" anim:sub-item="" smil:attributeName="rotate" smil:values="90;0" smil:keyTimes="0;1"/>
                  <anim:transitionFilter smil:dur="1s" smil:targetElement="id25" anim:sub-item="" smil:type="fade" smil:subtype="crossfad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924cm" presentation:class="subtitle" presentation:user-transformed="true">
          <draw:text-box>
            <text:p/>
          </draw:text-box>
        </draw:frame>
        <draw:frame draw:name="Tableau 7" draw:style-name="standard" xml:id="id26" draw:id="id26" draw:layer="layout" svg:width="5.064cm" svg:height="5.078cm" svg:x="2.699cm" svg:y="5.725cm">
          <table:table>
            <table:table-column table:style-name="co1"/>
            <table:table-row table:style-name="ro1">
              <table:table-cell table:style-name="ce15">
                <text:p text:style-name="P8"><text:span text:style-name="T8">NORD</text:span></text:p>
              </table:table-cell>
            </table:table-row>
            <table:table-row table:style-name="ro2">
              <table:table-cell table:style-name="ce16">
                <text:p text:style-name="P9"><text:span text:style-name="T9">♠ </text:span><text:span text:style-name="T9">D </text:span></text:p>
              </table:table-cell>
            </table:table-row>
            <table:table-row table:style-name="ro2">
              <table:table-cell table:style-name="ce17">
                <text:p text:style-name="P9"><text:span text:style-name="T9">♥ </text:span><text:span text:style-name="T9">R 8 2</text:span></text:p>
              </table:table-cell>
            </table:table-row>
            <table:table-row table:style-name="ro2">
              <table:table-cell table:style-name="ce18">
                <text:p text:style-name="P9"><text:span text:style-name="T9">♦ </text:span></text:p>
              </table:table-cell>
            </table:table-row>
            <table:table-row table:style-name="ro3">
              <table:table-cell table:style-name="ce19">
                <text:p text:style-name="P9"><text:span text:style-name="T9">♣ </text:span><text:span text:style-name="T9">R V 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au 8" draw:style-name="standard" xml:id="id27" draw:id="id27" draw:layer="layout" svg:width="5.064cm" svg:height="5.078cm" svg:x="2.699cm" svg:y="12.125cm">
          <table:table>
            <table:table-column table:style-name="co1"/>
            <table:table-row table:style-name="ro1">
              <table:table-cell table:style-name="ce20">
                <text:p text:style-name="P8"><text:span text:style-name="T8">SUD</text:span></text:p>
              </table:table-cell>
            </table:table-row>
            <table:table-row table:style-name="ro2">
              <table:table-cell table:style-name="ce21">
                <text:p text:style-name="P9"><text:span text:style-name="T9">♠ </text:span><text:span text:style-name="T9">6 </text:span></text:p>
              </table:table-cell>
            </table:table-row>
            <table:table-row table:style-name="ro2">
              <table:table-cell table:style-name="ce22">
                <text:p text:style-name="P9"><text:span text:style-name="T9">♥ </text:span><text:span text:style-name="T9">7 6 2</text:span></text:p>
              </table:table-cell>
            </table:table-row>
            <table:table-row table:style-name="ro2">
              <table:table-cell table:style-name="ce23">
                <text:p text:style-name="P9"><text:span text:style-name="T9">♦ </text:span></text:p>
              </table:table-cell>
            </table:table-row>
            <table:table-row table:style-name="ro3">
              <table:table-cell table:style-name="ce24">
                <text:p text:style-name="P9"><text:span text:style-name="T9">♣ </text:span><text:span text:style-name="T9">A 10 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au 2" draw:style-name="standard" xml:id="id28" draw:id="id28" draw:layer="layout" svg:width="11.832cm" svg:height="1.798cm" svg:x="9.3cm" svg:y="6.125cm">
          <table:table>
            <table:table-column table:style-name="co3"/>
            <table:table-row table:style-name="ro6">
              <table:table-cell table:style-name="ce25">
                <text:p text:style-name="P9"><text:span text:style-name="T8">Sud joue </text:span><text:span text:style-name="T10">♥</text:span><text:span text:style-name="T12"> vers le Roi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au 12" draw:style-name="standard" xml:id="id29" draw:id="id29" draw:layer="layout" svg:width="12.799cm" svg:height="2.198cm" svg:x="9.1cm" svg:y="9.125cm">
          <table:table>
            <table:table-column table:style-name="co4"/>
            <table:table-row table:style-name="ro7">
              <table:table-cell table:style-name="ce26">
                <text:p text:style-name="P10"><text:span text:style-name="T8">Soit le Roi </text:span><text:span text:style-name="T10">♥</text:span><text:span text:style-name="T12"> <text:s/>fait la levée et Sud ne perdra que 2</text:span><text:span text:style-name="T10">♥</text:span><text:span text:style-name="T12"> et </text:span><text:span text:style-name="T11">1</text:span><text:span text:style-name="T10">♣ </text:span><text:span text:style-name="T11">s’il est mal inspiré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au 9" draw:style-name="standard" xml:id="id30" draw:id="id30" draw:layer="layout" svg:width="12.199cm" svg:height="3.417cm" svg:x="9.3cm" svg:y="12.725cm">
          <table:table>
            <table:table-column table:style-name="co5"/>
            <table:table-row table:style-name="ro8">
              <table:table-cell table:style-name="ce27">
                <text:p text:style-name="P10"><text:span text:style-name="T8">Soit le Roi </text:span><text:span text:style-name="T10">♥</text:span><text:span text:style-name="T12"> <text:s/>est pris de l’As ; les adversaires feront 2 autres </text:span><text:span text:style-name="T10">♥</text:span><text:span text:style-name="T12"> mais devront jouer </text:span><text:span text:style-name="T10">♣ </text:span><text:span text:style-name="T11">dans la fourchette </text:span><text:span text:style-name="T10">R V </text:span><text:span text:style-name="T11">ou </text:span><text:span text:style-name="T10">A 10 </text:span><text:span text:style-name="T11">ou jouer dans coupe et défauss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Espace réservé du pied de page 4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26" anim:sub-item="" smil:attributeName="visibility" smil:to="visible"/>
                  <anim:animate smil:dur="1s" smil:fill="hold" smil:targetElement="id26" anim:sub-item="" smil:attributeName="width" smil:values="0;width" smil:keyTimes="0;1"/>
                  <anim:animate smil:dur="1s" smil:fill="hold" smil:targetElement="id26" anim:sub-item="" smil:attributeName="height" smil:values="0;height" smil:keyTimes="0;1"/>
                  <anim:animate smil:dur="1s" smil:fill="hold" smil:targetElement="id26" anim:sub-item="" smil:attributeName="rotate" smil:values="90;0" smil:keyTimes="0;1"/>
                  <anim:transitionFilter smil:dur="1s" smil:targetElement="id26" anim:sub-item="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27" anim:sub-item="" smil:attributeName="visibility" smil:to="visible"/>
                  <anim:animate smil:dur="1s" smil:fill="hold" smil:targetElement="id27" anim:sub-item="" smil:attributeName="width" smil:values="0;width" smil:keyTimes="0;1"/>
                  <anim:animate smil:dur="1s" smil:fill="hold" smil:targetElement="id27" anim:sub-item="" smil:attributeName="height" smil:values="0;height" smil:keyTimes="0;1"/>
                  <anim:animate smil:dur="1s" smil:fill="hold" smil:targetElement="id27" anim:sub-item="" smil:attributeName="rotate" smil:values="90;0" smil:keyTimes="0;1"/>
                  <anim:transitionFilter smil:dur="1s" smil:targetElement="id27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28" anim:sub-item="" smil:attributeName="visibility" smil:to="visible"/>
                  <anim:animate smil:dur="1s" smil:fill="hold" smil:targetElement="id28" anim:sub-item="" smil:attributeName="width" smil:values="0;width" smil:keyTimes="0;1"/>
                  <anim:animate smil:dur="1s" smil:fill="hold" smil:targetElement="id28" anim:sub-item="" smil:attributeName="height" smil:values="0;height" smil:keyTimes="0;1"/>
                  <anim:animate smil:dur="1s" smil:fill="hold" smil:targetElement="id28" anim:sub-item="" smil:attributeName="rotate" smil:values="90;0" smil:keyTimes="0;1"/>
                  <anim:transitionFilter smil:dur="1s" smil:targetElement="id28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29" anim:sub-item="" smil:attributeName="visibility" smil:to="visible"/>
                  <anim:animate smil:dur="1s" smil:fill="hold" smil:targetElement="id29" anim:sub-item="" smil:attributeName="width" smil:values="0;width" smil:keyTimes="0;1"/>
                  <anim:animate smil:dur="1s" smil:fill="hold" smil:targetElement="id29" anim:sub-item="" smil:attributeName="height" smil:values="0;height" smil:keyTimes="0;1"/>
                  <anim:animate smil:dur="1s" smil:fill="hold" smil:targetElement="id29" anim:sub-item="" smil:attributeName="rotate" smil:values="90;0" smil:keyTimes="0;1"/>
                  <anim:transitionFilter smil:dur="1s" smil:targetElement="id29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30" anim:sub-item="" smil:attributeName="visibility" smil:to="visible"/>
                  <anim:animate smil:dur="1s" smil:fill="hold" smil:targetElement="id30" anim:sub-item="" smil:attributeName="width" smil:values="0;width" smil:keyTimes="0;1"/>
                  <anim:animate smil:dur="1s" smil:fill="hold" smil:targetElement="id30" anim:sub-item="" smil:attributeName="height" smil:values="0;height" smil:keyTimes="0;1"/>
                  <anim:animate smil:dur="1s" smil:fill="hold" smil:targetElement="id30" anim:sub-item="" smil:attributeName="rotate" smil:values="90;0" smil:keyTimes="0;1"/>
                  <anim:transitionFilter smil:dur="1s" smil:targetElement="id30" anim:sub-item="" smil:type="fade" smil:subtype="crossfade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1" draw:layer="layout" svg:width="11.429cm" svg:height="8.572cm" svg:x="3.81cm" svg:y="3.175cm" draw:page-number="5" presentation:class="page"/>
          <draw:frame draw:name="Espace réservé des commentaires 2" presentation:style-name="pr4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5" draw:text-style-name="P5" draw:layer="layout" svg:width="8.254cm" svg:height="1.273cm" svg:x="10.791cm" svg:y="24.126cm" presentation:class="page-number" presentation:user-transformed="true">
            <draw:text-box>
              <text:p text:style-name="P3"><text:span text:style-name="T4"><text:page-number>&lt;numéro&gt;</text:page-number></text:span></text:p>
            </draw:text-box>
          </draw:frame>
        </presentation:notes>
      </draw:page>
      <draw:page draw:name="page6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924cm" presentation:class="subtitle" presentation:user-transformed="true">
          <draw:text-box>
            <text:list text:style-name="L11">
              <text:list-item>
                <text:p xml:id="id31" text:id="id31" text:style-name="P9"><text:span text:style-name="T6">Couleurs à problème :</text:span></text:p>
              </text:list-item>
            </text:list>
            <text:list text:style-name="L12">
              <text:list-item>
                <text:list>
                  <text:list-item>
                    <text:p xml:id="id32" text:id="id32" text:style-name="P9"><text:span text:style-name="T13">exemples de couleurs où il est indifférent que ce soit l’adversaire de gauche ou de droite qui soit mis en main : quand l’adversaire joue, il suffit de mettre petit</text:span></text:p>
                  </text:list-item>
                </text:list>
              </text:list-item>
            </text:list>
            <text:p text:style-name="P9"><text:span text:style-name="T13"/></text:p>
            <text:p text:style-name="P9"><text:span text:style-name="T13"/></text:p>
            <text:p text:style-name="P9"><text:span text:style-name="T13"/></text:p>
            <text:list text:continue-numbering="true" text:style-name="L12">
              <text:list-item>
                <text:list>
                  <text:list-item>
                    <text:p xml:id="id41" text:id="id41" text:style-name="P9"><text:span text:style-name="T13">Exemples de couleurs où la remise en main doit être orientée :</text:span></text:p>
                  </text:list-item>
                </text:list>
              </text:list-item>
            </text:list>
            <text:p text:style-name="P9"><text:span text:style-name="T13"/></text:p>
            <text:p text:style-name="P9"><text:span text:style-name="T13"/></text:p>
            <text:p text:style-name="P9"><text:span text:style-name="T13"/></text:p>
            <text:list text:style-name="L13">
              <text:list-item>
                <text:list>
                  <text:list-item>
                    <text:list>
                      <text:list-item>
                        <text:p xml:id="id50" text:id="id50" text:style-name="P9"><text:span text:style-name="T14">Si c’est l’adversaire Ouest qui joue, tout va bien pour vou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ableau 4" draw:style-name="standard" xml:id="id33" draw:id="id33" draw:layer="layout" svg:width="4.799cm" svg:height="1.029cm" svg:x="2.299cm" svg:y="8.1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28">
                <text:p text:style-name="P8"><text:span text:style-name="T8">A</text:span></text:p>
              </table:table-cell>
              <table:table-cell table:style-name="ce29">
                <text:p text:style-name="P8"><text:span text:style-name="T8">V</text:span></text:p>
              </table:table-cell>
              <table:table-cell table:style-name="ce30">
                <text:p text:style-name="P8"><text:span text:style-name="T8">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au 10" draw:style-name="standard" xml:id="id34" draw:id="id34" draw:layer="layout" svg:width="4.799cm" svg:height="1.029cm" svg:x="2.299cm" svg:y="9.5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31">
                <text:p text:style-name="P8"><text:span text:style-name="T8">R</text:span></text:p>
              </table:table-cell>
              <table:table-cell table:style-name="ce32">
                <text:p text:style-name="P8"><text:span text:style-name="T8">10</text:span></text:p>
              </table:table-cell>
              <table:table-cell table:style-name="ce33">
                <text:p text:style-name="P8"><text:span text:style-name="T8">2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Tableau 11" draw:style-name="standard" xml:id="id35" draw:id="id35" draw:layer="layout" svg:width="4.799cm" svg:height="1.029cm" svg:x="7.699cm" svg:y="8.1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34">
                <text:p text:style-name="P8"><text:span text:style-name="T8">R</text:span></text:p>
              </table:table-cell>
              <table:table-cell table:style-name="ce35">
                <text:p text:style-name="P8"><text:span text:style-name="T8">9</text:span></text:p>
              </table:table-cell>
              <table:table-cell table:style-name="ce36">
                <text:p text:style-name="P8"><text:span text:style-name="T8">4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Tableau 13" draw:style-name="standard" xml:id="id36" draw:id="id36" draw:layer="layout" svg:width="4.799cm" svg:height="1.029cm" svg:x="7.699cm" svg:y="9.5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37">
                <text:p text:style-name="P8"><text:span text:style-name="T8">D</text:span></text:p>
              </table:table-cell>
              <table:table-cell table:style-name="ce38">
                <text:p text:style-name="P8"><text:span text:style-name="T8">10</text:span></text:p>
              </table:table-cell>
              <table:table-cell table:style-name="ce39">
                <text:p text:style-name="P8"><text:span text:style-name="T8">5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Tableau 14" draw:style-name="standard" xml:id="id37" draw:id="id37" draw:layer="layout" svg:width="4.799cm" svg:height="1.029cm" svg:x="12.9cm" svg:y="8.1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40">
                <text:p text:style-name="P8"><text:span text:style-name="T8">D</text:span></text:p>
              </table:table-cell>
              <table:table-cell table:style-name="ce41">
                <text:p text:style-name="P8"><text:span text:style-name="T8">7</text:span></text:p>
              </table:table-cell>
              <table:table-cell table:style-name="ce42">
                <text:p text:style-name="P8"><text:span text:style-name="T8">6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Tableau 15" draw:style-name="standard" xml:id="id38" draw:id="id38" draw:layer="layout" svg:width="4.799cm" svg:height="1.029cm" svg:x="12.9cm" svg:y="9.5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43">
                <text:p text:style-name="P8"><text:span text:style-name="T8">V</text:span></text:p>
              </table:table-cell>
              <table:table-cell table:style-name="ce44">
                <text:p text:style-name="P8"><text:span text:style-name="T8">5</text:span></text:p>
              </table:table-cell>
              <table:table-cell table:style-name="ce45">
                <text:p text:style-name="P8"><text:span text:style-name="T8">3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Tableau 16" draw:style-name="standard" xml:id="id39" draw:id="id39" draw:layer="layout" svg:width="4.799cm" svg:height="1.029cm" svg:x="18.301cm" svg:y="8.1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46">
                <text:p text:style-name="P8"><text:span text:style-name="T8">V</text:span></text:p>
              </table:table-cell>
              <table:table-cell table:style-name="ce47">
                <text:p text:style-name="P8"><text:span text:style-name="T8">4</text:span></text:p>
              </table:table-cell>
              <table:table-cell table:style-name="ce48">
                <text:p text:style-name="P8"><text:span text:style-name="T8">3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Tableau 17" draw:style-name="standard" xml:id="id40" draw:id="id40" draw:layer="layout" svg:width="4.799cm" svg:height="1.029cm" svg:x="18.301cm" svg:y="9.5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49">
                <text:p text:style-name="P8"><text:span text:style-name="T8">R</text:span></text:p>
              </table:table-cell>
              <table:table-cell table:style-name="ce50">
                <text:p text:style-name="P8"><text:span text:style-name="T8">6</text:span></text:p>
              </table:table-cell>
              <table:table-cell table:style-name="ce51">
                <text:p text:style-name="P8"><text:span text:style-name="T8">2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Tableau 18" draw:style-name="standard" xml:id="id42" draw:id="id42" draw:layer="layout" svg:width="4.799cm" svg:height="1.029cm" svg:x="2.351cm" svg:y="12.3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52">
                <text:p text:style-name="P8"><text:span text:style-name="T8">R</text:span></text:p>
              </table:table-cell>
              <table:table-cell table:style-name="ce53">
                <text:p text:style-name="P8"><text:span text:style-name="T8">7</text:span></text:p>
              </table:table-cell>
              <table:table-cell table:style-name="ce54">
                <text:p text:style-name="P8"><text:span text:style-name="T8">4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Tableau 19" draw:style-name="standard" xml:id="id43" draw:id="id43" draw:layer="layout" svg:width="4.799cm" svg:height="1.029cm" svg:x="2.346cm" svg:y="13.7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55">
                <text:p text:style-name="P8"><text:span text:style-name="T8">A</text:span></text:p>
              </table:table-cell>
              <table:table-cell table:style-name="ce56">
                <text:p text:style-name="P8"><text:span text:style-name="T8">V</text:span></text:p>
              </table:table-cell>
              <table:table-cell table:style-name="ce57">
                <text:p text:style-name="P8"><text:span text:style-name="T8">5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name="Tableau 20" draw:style-name="standard" xml:id="id44" draw:id="id44" draw:layer="layout" svg:width="4.799cm" svg:height="1.029cm" svg:x="7.899cm" svg:y="12.3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58">
                <text:p text:style-name="P8"><text:span text:style-name="T8">7</text:span></text:p>
              </table:table-cell>
              <table:table-cell table:style-name="ce59">
                <text:p text:style-name="P8"><text:span text:style-name="T8">6</text:span></text:p>
              </table:table-cell>
              <table:table-cell table:style-name="ce60">
                <text:p text:style-name="P8"><text:span text:style-name="T8">5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Tableau 21" draw:style-name="standard" xml:id="id45" draw:id="id45" draw:layer="layout" svg:width="4.799cm" svg:height="1.029cm" svg:x="7.899cm" svg:y="13.7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61">
                <text:p text:style-name="P8"><text:span text:style-name="T8">R</text:span></text:p>
              </table:table-cell>
              <table:table-cell table:style-name="ce62">
                <text:p text:style-name="P8"><text:span text:style-name="T8">V</text:span></text:p>
              </table:table-cell>
              <table:table-cell table:style-name="ce63">
                <text:p text:style-name="P8"><text:span text:style-name="T8">4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name="Tableau 22" draw:style-name="standard" xml:id="id46" draw:id="id46" draw:layer="layout" svg:width="4.799cm" svg:height="1.029cm" svg:x="13.5cm" svg:y="12.3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64">
                <text:p text:style-name="P8"><text:span text:style-name="T8">A</text:span></text:p>
              </table:table-cell>
              <table:table-cell table:style-name="ce65">
                <text:p text:style-name="P8"><text:span text:style-name="T8">4</text:span></text:p>
              </table:table-cell>
              <table:table-cell table:style-name="ce66">
                <text:p text:style-name="P8"><text:span text:style-name="T8">2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Tableau 23" draw:style-name="standard" xml:id="id47" draw:id="id47" draw:layer="layout" svg:width="4.799cm" svg:height="1.029cm" svg:x="13.5cm" svg:y="13.7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67">
                <text:p text:style-name="P8"><text:span text:style-name="T8">D</text:span></text:p>
              </table:table-cell>
              <table:table-cell table:style-name="ce68">
                <text:p text:style-name="P8"><text:span text:style-name="T8">7</text:span></text:p>
              </table:table-cell>
              <table:table-cell table:style-name="ce69">
                <text:p text:style-name="P8"><text:span text:style-name="T8">6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name="Tableau 24" draw:style-name="standard" xml:id="id48" draw:id="id48" draw:layer="layout" svg:width="4.799cm" svg:height="1.029cm" svg:x="18.867cm" svg:y="12.3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70">
                <text:p text:style-name="P8"><text:span text:style-name="T8">V</text:span></text:p>
              </table:table-cell>
              <table:table-cell table:style-name="ce71">
                <text:p text:style-name="P8"><text:span text:style-name="T8">4</text:span></text:p>
              </table:table-cell>
              <table:table-cell table:style-name="ce72">
                <text:p text:style-name="P8"><text:span text:style-name="T8">3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name="Tableau 25" draw:style-name="standard" xml:id="id49" draw:id="id49" draw:layer="layout" svg:width="4.799cm" svg:height="1.029cm" svg:x="18.901cm" svg:y="13.725cm">
          <table:table>
            <table:table-column table:style-name="co6"/>
            <table:table-column table:style-name="co6"/>
            <table:table-column table:style-name="co6"/>
            <table:table-row table:style-name="ro9">
              <table:table-cell table:style-name="ce73">
                <text:p text:style-name="P8"><text:span text:style-name="T8">A</text:span></text:p>
              </table:table-cell>
              <table:table-cell table:style-name="ce74">
                <text:p text:style-name="P8"><text:span text:style-name="T8">10</text:span></text:p>
              </table:table-cell>
              <table:table-cell table:style-name="ce75">
                <text:p text:style-name="P8"><text:span text:style-name="T8">7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name="Espace réservé du pied de page 2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  <anim:animate smil:dur="1s" smil:fill="hold" smil:targetElement="id32" anim:sub-item="text" smil:attributeName="x" smil:values="x;x" smil:keyTimes="0;1"/>
                  <anim:animate smil:dur="1s" smil:fill="hold" smil:targetElement="id3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" anim:sub-item="" smil:attributeName="visibility" smil:to="visible"/>
                  <anim:transitionFilter smil:dur="0.5s" smil:targetElement="id33" anim:sub-item="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4" anim:sub-item="" smil:attributeName="visibility" smil:to="visible"/>
                  <anim:transitionFilter smil:dur="0.5s" smil:targetElement="id34" anim:sub-item="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" anim:sub-item="" smil:attributeName="visibility" smil:to="visible"/>
                  <anim:transitionFilter smil:dur="0.5s" smil:targetElement="id35" anim:sub-item="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6" anim:sub-item="" smil:attributeName="visibility" smil:to="visible"/>
                  <anim:transitionFilter smil:dur="0.5s" smil:targetElement="id36" anim:sub-item="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" anim:sub-item="" smil:attributeName="visibility" smil:to="visible"/>
                  <anim:transitionFilter smil:dur="0.5s" smil:targetElement="id37" anim:sub-item="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8" anim:sub-item="" smil:attributeName="visibility" smil:to="visible"/>
                  <anim:transitionFilter smil:dur="0.5s" smil:targetElement="id38" anim:sub-item="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anim:sub-item="" smil:attributeName="visibility" smil:to="visible"/>
                  <anim:transitionFilter smil:dur="0.5s" smil:targetElement="id39" anim:sub-item="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0" anim:sub-item="" smil:attributeName="visibility" smil:to="visible"/>
                  <anim:transitionFilter smil:dur="0.5s" smil:targetElement="id40" anim:sub-item="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2" anim:sub-item="" smil:attributeName="visibility" smil:to="visible"/>
                  <anim:transitionFilter smil:dur="1s" smil:targetElement="id42" anim:sub-item="" smil:type="fade" smil:subtype="crossfade"/>
                  <anim:animate smil:dur="1s" smil:fill="hold" smil:targetElement="id42" anim:sub-item="" smil:attributeName="x" smil:values="x;x" smil:keyTimes="0;1"/>
                  <anim:animate smil:dur="1s" smil:fill="hold" smil:targetElement="id42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" anim:sub-item="" smil:attributeName="visibility" smil:to="visible"/>
                  <anim:transitionFilter smil:dur="1s" smil:targetElement="id43" anim:sub-item="" smil:type="fade" smil:subtype="crossfade"/>
                  <anim:animate smil:dur="1s" smil:fill="hold" smil:targetElement="id43" anim:sub-item="" smil:attributeName="x" smil:values="x;x" smil:keyTimes="0;1"/>
                  <anim:animate smil:dur="1s" smil:fill="hold" smil:targetElement="id43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4" anim:sub-item="" smil:attributeName="visibility" smil:to="visible"/>
                  <anim:transitionFilter smil:dur="1s" smil:targetElement="id44" anim:sub-item="" smil:type="fade" smil:subtype="crossfade"/>
                  <anim:animate smil:dur="1s" smil:fill="hold" smil:targetElement="id44" anim:sub-item="" smil:attributeName="x" smil:values="x;x" smil:keyTimes="0;1"/>
                  <anim:animate smil:dur="1s" smil:fill="hold" smil:targetElement="id44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5" anim:sub-item="" smil:attributeName="visibility" smil:to="visible"/>
                  <anim:transitionFilter smil:dur="1s" smil:targetElement="id45" anim:sub-item="" smil:type="fade" smil:subtype="crossfade"/>
                  <anim:animate smil:dur="1s" smil:fill="hold" smil:targetElement="id45" anim:sub-item="" smil:attributeName="x" smil:values="x;x" smil:keyTimes="0;1"/>
                  <anim:animate smil:dur="1s" smil:fill="hold" smil:targetElement="id45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6" anim:sub-item="" smil:attributeName="visibility" smil:to="visible"/>
                  <anim:transitionFilter smil:dur="1s" smil:targetElement="id46" anim:sub-item="" smil:type="fade" smil:subtype="crossfade"/>
                  <anim:animate smil:dur="1s" smil:fill="hold" smil:targetElement="id46" anim:sub-item="" smil:attributeName="x" smil:values="x;x" smil:keyTimes="0;1"/>
                  <anim:animate smil:dur="1s" smil:fill="hold" smil:targetElement="id46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7" anim:sub-item="" smil:attributeName="visibility" smil:to="visible"/>
                  <anim:transitionFilter smil:dur="1s" smil:targetElement="id47" anim:sub-item="" smil:type="fade" smil:subtype="crossfade"/>
                  <anim:animate smil:dur="1s" smil:fill="hold" smil:targetElement="id47" anim:sub-item="" smil:attributeName="x" smil:values="x;x" smil:keyTimes="0;1"/>
                  <anim:animate smil:dur="1s" smil:fill="hold" smil:targetElement="id47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8" anim:sub-item="" smil:attributeName="visibility" smil:to="visible"/>
                  <anim:transitionFilter smil:dur="1s" smil:targetElement="id48" anim:sub-item="" smil:type="fade" smil:subtype="crossfade"/>
                  <anim:animate smil:dur="1s" smil:fill="hold" smil:targetElement="id48" anim:sub-item="" smil:attributeName="x" smil:values="x;x" smil:keyTimes="0;1"/>
                  <anim:animate smil:dur="1s" smil:fill="hold" smil:targetElement="id48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9" anim:sub-item="" smil:attributeName="visibility" smil:to="visible"/>
                  <anim:transitionFilter smil:dur="1s" smil:targetElement="id49" anim:sub-item="" smil:type="fade" smil:subtype="crossfade"/>
                  <anim:animate smil:dur="1s" smil:fill="hold" smil:targetElement="id49" anim:sub-item="" smil:attributeName="x" smil:values="x;x" smil:keyTimes="0;1"/>
                  <anim:animate smil:dur="1s" smil:fill="hold" smil:targetElement="id49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51" text:id="id51" text:style-name="P6"><text:span text:style-name="T6">B) Conditions de remise en main :</text:span></text:p>
            <text:p xml:id="id52" text:id="id52" text:style-name="P6"><text:span text:style-name="T6"><text:tab/></text:span><text:span text:style-name="T15">1°) Une couleur annexe également répartie entre les 2 mains : exemple</text:span></text:p>
            <text:p text:style-name="P6"><text:span text:style-name="T6"/></text:p>
            <text:p text:style-name="P6"><text:span text:style-name="T7"/></text:p>
          </draw:text-box>
        </draw:frame>
        <draw:frame draw:name="Tableau 26" draw:style-name="standard" xml:id="id53" draw:id="id53" draw:layer="layout" svg:width="5.064cm" svg:height="5.078cm" svg:x="2.899cm" svg:y="6.925cm">
          <table:table>
            <table:table-column table:style-name="co1"/>
            <table:table-row table:style-name="ro1">
              <table:table-cell table:style-name="ce76">
                <text:p text:style-name="P8"><text:span text:style-name="T8">NORD</text:span></text:p>
              </table:table-cell>
            </table:table-row>
            <table:table-row table:style-name="ro2">
              <table:table-cell table:style-name="ce77">
                <text:p text:style-name="P9"><text:span text:style-name="T9">♠ </text:span><text:span text:style-name="T9">D 7 4 2</text:span></text:p>
              </table:table-cell>
            </table:table-row>
            <table:table-row table:style-name="ro2">
              <table:table-cell table:style-name="ce78">
                <text:p text:style-name="P9"><text:span text:style-name="T9">♥ </text:span><text:span text:style-name="T9">A 8</text:span></text:p>
              </table:table-cell>
            </table:table-row>
            <table:table-row table:style-name="ro2">
              <table:table-cell table:style-name="ce79">
                <text:p text:style-name="P9"><text:span text:style-name="T9">♦ </text:span><text:span text:style-name="T9">A 8 5</text:span></text:p>
              </table:table-cell>
            </table:table-row>
            <table:table-row table:style-name="ro3">
              <table:table-cell table:style-name="ce80">
                <text:p text:style-name="P9"><text:span text:style-name="T9">♣ </text:span><text:span text:style-name="T9">R V 5 3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Tableau 27" draw:style-name="standard" xml:id="id54" draw:id="id54" draw:layer="layout" svg:width="5.064cm" svg:height="5.078cm" svg:x="2.899cm" svg:y="12.846cm">
          <table:table>
            <table:table-column table:style-name="co1"/>
            <table:table-row table:style-name="ro1">
              <table:table-cell table:style-name="ce81">
                <text:p text:style-name="P8"><text:span text:style-name="T8">SUD</text:span></text:p>
              </table:table-cell>
            </table:table-row>
            <table:table-row table:style-name="ro2">
              <table:table-cell table:style-name="ce82">
                <text:p text:style-name="P9"><text:span text:style-name="T9">♠ </text:span><text:span text:style-name="T9">A R V 6 5</text:span></text:p>
              </table:table-cell>
            </table:table-row>
            <table:table-row table:style-name="ro2">
              <table:table-cell table:style-name="ce83">
                <text:p text:style-name="P9"><text:span text:style-name="T9">♥ </text:span><text:span text:style-name="T9">V 4</text:span></text:p>
              </table:table-cell>
            </table:table-row>
            <table:table-row table:style-name="ro2">
              <table:table-cell table:style-name="ce84">
                <text:p text:style-name="P9"><text:span text:style-name="T9">♦ </text:span><text:span text:style-name="T9">R D 3</text:span></text:p>
              </table:table-cell>
            </table:table-row>
            <table:table-row table:style-name="ro3">
              <table:table-cell table:style-name="ce85">
                <text:p text:style-name="P9"><text:span text:style-name="T9">♣ </text:span><text:span text:style-name="T9">A 10 4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name="Tableau 2" draw:style-name="standard" xml:id="id55" draw:id="id55" draw:layer="layout" svg:width="8.399cm" svg:height="1.198cm" svg:x="9.5cm" svg:y="7.125cm">
          <table:table>
            <table:table-column table:style-name="co7"/>
            <table:table-row table:style-name="ro10">
              <table:table-cell table:style-name="ce86">
                <text:p text:style-name="P9"><text:span text:style-name="T8">Contrat 6</text:span><text:span text:style-name="T10">♠ ; entame R♥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name="Tableau 5" draw:style-name="standard" xml:id="id56" draw:id="id56" draw:layer="layout" svg:width="13.6cm" svg:height="1.398cm" svg:x="9.5cm" svg:y="9.125cm">
          <table:table>
            <table:table-column table:style-name="co8"/>
            <table:table-row table:style-name="ro4">
              <table:table-cell table:style-name="ce87">
                <text:p text:style-name="P9"><text:span text:style-name="T8">Plan de jeu : 1 perdante à </text:span><text:span text:style-name="T10">♣ </text:span><text:span text:style-name="T12">et une perdante à </text:span><text:span text:style-name="T10">♥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name="Tableau 6" draw:style-name="standard" xml:id="id57" draw:id="id57" draw:layer="layout" svg:width="15.6cm" svg:height="1.398cm" svg:x="9.346cm" svg:y="11.325cm">
          <table:table>
            <table:table-column table:style-name="co9"/>
            <table:table-row table:style-name="ro4">
              <table:table-cell table:style-name="ce88">
                <text:p text:style-name="P9"><text:span text:style-name="T8">à <text:s/></text:span><text:span text:style-name="T10">♣ </text:span><text:span text:style-name="T12">on peut faire l’impasse des 2 côtés ! Lequel choisir ?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name="Tableau 7" draw:style-name="standard" xml:id="id58" draw:id="id58" draw:layer="layout" svg:width="15.2cm" svg:height="3.438cm" svg:x="9.3cm" svg:y="13.525cm">
          <table:table>
            <table:table-column table:style-name="co10"/>
            <table:table-row table:style-name="ro11">
              <table:table-cell table:style-name="ce89">
                <text:p text:style-name="P9"><text:span text:style-name="T16">La solution </text:span><text:span text:style-name="T8">: prendre l’entame de l’ As </text:span><text:span text:style-name="T10">♥</text:span><text:span text:style-name="T12"> , faire tomber les atouts, éliminer les </text:span><text:span text:style-name="T10">♦ </text:span><text:span text:style-name="T12">et remettre Ouest en main en jouant le </text:span><text:span text:style-name="T10">V</text:span><text:span text:style-name="T12"> </text:span><text:span text:style-name="T10">♥</text:span><text:span text:style-name="T12">. <text:s/>Ouest n’aura d’autres solutions que de jouer dans la fourchette </text:span><text:span text:style-name="T10">♣</text:span><text:span text:style-name="T12"> ou coupe et défausse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name="Espace réservé du pied de page 4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  <anim:animate smil:dur="1s" smil:fill="hold" smil:targetElement="id52" anim:sub-item="text" smil:attributeName="x" smil:values="x;x" smil:keyTimes="0;1"/>
                  <anim:animate smil:dur="1s" smil:fill="hold" smil:targetElement="id5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53" anim:sub-item="" smil:attributeName="visibility" smil:to="visible"/>
                  <anim:animate smil:dur="1s" smil:fill="hold" smil:targetElement="id53" anim:sub-item="" smil:attributeName="width" smil:values="0;width" smil:keyTimes="0;1"/>
                  <anim:animate smil:dur="1s" smil:fill="hold" smil:targetElement="id53" anim:sub-item="" smil:attributeName="height" smil:values="0;height" smil:keyTimes="0;1"/>
                  <anim:animate smil:dur="1s" smil:fill="hold" smil:targetElement="id53" anim:sub-item="" smil:attributeName="rotate" smil:values="90;0" smil:keyTimes="0;1"/>
                  <anim:transitionFilter smil:dur="1s" smil:targetElement="id53" anim:sub-item="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54" anim:sub-item="" smil:attributeName="visibility" smil:to="visible"/>
                  <anim:animate smil:dur="1s" smil:fill="hold" smil:targetElement="id54" anim:sub-item="" smil:attributeName="width" smil:values="0;width" smil:keyTimes="0;1"/>
                  <anim:animate smil:dur="1s" smil:fill="hold" smil:targetElement="id54" anim:sub-item="" smil:attributeName="height" smil:values="0;height" smil:keyTimes="0;1"/>
                  <anim:animate smil:dur="1s" smil:fill="hold" smil:targetElement="id54" anim:sub-item="" smil:attributeName="rotate" smil:values="90;0" smil:keyTimes="0;1"/>
                  <anim:transitionFilter smil:dur="1s" smil:targetElement="id54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5" anim:sub-item="" smil:attributeName="visibility" smil:to="visible"/>
                  <anim:transitionFilter smil:dur="1s" smil:targetElement="id55" anim:sub-item="" smil:type="fade" smil:subtype="crossfade"/>
                  <anim:animate smil:dur="1s" smil:fill="hold" smil:targetElement="id55" anim:sub-item="" smil:attributeName="x" smil:values="x;x" smil:keyTimes="0;1"/>
                  <anim:animate smil:dur="1s" smil:fill="hold" smil:targetElement="id55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6" anim:sub-item="" smil:attributeName="visibility" smil:to="visible"/>
                  <anim:transitionFilter smil:dur="1s" smil:targetElement="id56" anim:sub-item="" smil:type="fade" smil:subtype="crossfade"/>
                  <anim:animate smil:dur="1s" smil:fill="hold" smil:targetElement="id56" anim:sub-item="" smil:attributeName="x" smil:values="x;x" smil:keyTimes="0;1"/>
                  <anim:animate smil:dur="1s" smil:fill="hold" smil:targetElement="id56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7" anim:sub-item="" smil:attributeName="visibility" smil:to="visible"/>
                  <anim:transitionFilter smil:dur="1s" smil:targetElement="id57" anim:sub-item="" smil:type="fade" smil:subtype="crossfade"/>
                  <anim:animate smil:dur="1s" smil:fill="hold" smil:targetElement="id57" anim:sub-item="" smil:attributeName="x" smil:values="x;x" smil:keyTimes="0;1"/>
                  <anim:animate smil:dur="1s" smil:fill="hold" smil:targetElement="id57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8" anim:sub-item="" smil:attributeName="visibility" smil:to="visible"/>
                  <anim:transitionFilter smil:dur="1s" smil:targetElement="id58" anim:sub-item="" smil:type="fade" smil:subtype="crossfade"/>
                  <anim:animate smil:dur="1s" smil:fill="hold" smil:targetElement="id58" anim:sub-item="" smil:attributeName="x" smil:values="x;x" smil:keyTimes="0;1"/>
                  <anim:animate smil:dur="1s" smil:fill="hold" smil:targetElement="id58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59" text:id="id59" text:style-name="P1"><text:span text:style-name="T6">Les 4 mains :</text:span></text:p>
            <text:p text:style-name="P6"><text:span text:style-name="T7"/></text:p>
          </draw:text-box>
        </draw:frame>
        <draw:frame draw:name="Tableau 26" draw:style-name="standard" xml:id="id60" draw:id="id60" draw:layer="layout" svg:width="5.064cm" svg:height="5.078cm" svg:x="10.3cm" svg:y="5.525cm">
          <table:table>
            <table:table-column table:style-name="co1"/>
            <table:table-row table:style-name="ro1">
              <table:table-cell table:style-name="ce90">
                <text:p text:style-name="P8"><text:span text:style-name="T8">NORD</text:span></text:p>
              </table:table-cell>
            </table:table-row>
            <table:table-row table:style-name="ro2">
              <table:table-cell table:style-name="ce91">
                <text:p text:style-name="P9"><text:span text:style-name="T9">♠ </text:span><text:span text:style-name="T9">D 7 4 2</text:span></text:p>
              </table:table-cell>
            </table:table-row>
            <table:table-row table:style-name="ro2">
              <table:table-cell table:style-name="ce92">
                <text:p text:style-name="P9"><text:span text:style-name="T9">♥ </text:span><text:span text:style-name="T9">A 8</text:span></text:p>
              </table:table-cell>
            </table:table-row>
            <table:table-row table:style-name="ro2">
              <table:table-cell table:style-name="ce93">
                <text:p text:style-name="P9"><text:span text:style-name="T9">♦ </text:span><text:span text:style-name="T9">A 8 5</text:span></text:p>
              </table:table-cell>
            </table:table-row>
            <table:table-row table:style-name="ro3">
              <table:table-cell table:style-name="ce94">
                <text:p text:style-name="P9"><text:span text:style-name="T9">♣ </text:span><text:span text:style-name="T9">R V 5 3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name="Tableau 27" draw:style-name="standard" xml:id="id62" draw:id="id62" draw:layer="layout" svg:width="5.064cm" svg:height="5.078cm" svg:x="10.5cm" svg:y="12.325cm">
          <table:table>
            <table:table-column table:style-name="co1"/>
            <table:table-row table:style-name="ro1">
              <table:table-cell table:style-name="ce95">
                <text:p text:style-name="P8"><text:span text:style-name="T8">SUD</text:span></text:p>
              </table:table-cell>
            </table:table-row>
            <table:table-row table:style-name="ro2">
              <table:table-cell table:style-name="ce96">
                <text:p text:style-name="P9"><text:span text:style-name="T9">♠ </text:span><text:span text:style-name="T9">A R V 6 5</text:span></text:p>
              </table:table-cell>
            </table:table-row>
            <table:table-row table:style-name="ro2">
              <table:table-cell table:style-name="ce97">
                <text:p text:style-name="P9"><text:span text:style-name="T9">♥ </text:span><text:span text:style-name="T9">V 4</text:span></text:p>
              </table:table-cell>
            </table:table-row>
            <table:table-row table:style-name="ro2">
              <table:table-cell table:style-name="ce98">
                <text:p text:style-name="P9"><text:span text:style-name="T9">♦ </text:span><text:span text:style-name="T9">R D 3</text:span></text:p>
              </table:table-cell>
            </table:table-row>
            <table:table-row table:style-name="ro3">
              <table:table-cell table:style-name="ce99">
                <text:p text:style-name="P9"><text:span text:style-name="T9">♣ </text:span><text:span text:style-name="T9">A 10 4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name="Tableau 9" draw:style-name="standard" xml:id="id61" draw:id="id61" draw:layer="layout" svg:width="5.064cm" svg:height="5.649cm" svg:x="4.499cm" svg:y="9.125cm">
          <table:table>
            <table:table-column table:style-name="co1"/>
            <table:table-row table:style-name="ro9">
              <table:table-cell table:style-name="ce100">
                <text:p text:style-name="P8"><text:span text:style-name="T8">OUEST</text:span></text:p>
              </table:table-cell>
            </table:table-row>
            <table:table-row table:style-name="ro12">
              <table:table-cell table:style-name="ce101">
                <text:p text:style-name="P9"><text:span text:style-name="T9">♠ </text:span><text:span text:style-name="T9">8 3</text:span></text:p>
              </table:table-cell>
            </table:table-row>
            <table:table-row table:style-name="ro13">
              <table:table-cell table:style-name="ce102">
                <text:p text:style-name="P9"><text:span text:style-name="T9">♥ </text:span><text:span text:style-name="T9">R D 10 9 6</text:span></text:p>
              </table:table-cell>
            </table:table-row>
            <table:table-row table:style-name="ro12">
              <table:table-cell table:style-name="ce103">
                <text:p text:style-name="P9"><text:span text:style-name="T9">♦ </text:span><text:span text:style-name="T9">V 2</text:span></text:p>
              </table:table-cell>
            </table:table-row>
            <table:table-row table:style-name="ro12">
              <table:table-cell table:style-name="ce104">
                <text:p text:style-name="P9"><text:span text:style-name="T9">♣ </text:span><text:span text:style-name="T9">D 8 6 2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name="Tableau 10" draw:style-name="standard" xml:id="id63" draw:id="id63" draw:layer="layout" svg:width="5.064cm" svg:height="5.649cm" svg:x="16.7cm" svg:y="9.325cm">
          <table:table>
            <table:table-column table:style-name="co1"/>
            <table:table-row table:style-name="ro9">
              <table:table-cell table:style-name="ce105">
                <text:p text:style-name="P8"><text:span text:style-name="T8">EST</text:span></text:p>
              </table:table-cell>
            </table:table-row>
            <table:table-row table:style-name="ro12">
              <table:table-cell table:style-name="ce106">
                <text:p text:style-name="P9"><text:span text:style-name="T9">♠ </text:span><text:span text:style-name="T9">10 9</text:span></text:p>
              </table:table-cell>
            </table:table-row>
            <table:table-row table:style-name="ro12">
              <table:table-cell table:style-name="ce107">
                <text:p text:style-name="P9"><text:span text:style-name="T9">♥ </text:span><text:span text:style-name="T9">7 5 3 2</text:span></text:p>
              </table:table-cell>
            </table:table-row>
            <table:table-row table:style-name="ro13">
              <table:table-cell table:style-name="ce108">
                <text:p text:style-name="P9"><text:span text:style-name="T9">♦ </text:span><text:span text:style-name="T9">10 9 7 6 4</text:span></text:p>
              </table:table-cell>
            </table:table-row>
            <table:table-row table:style-name="ro12">
              <table:table-cell table:style-name="ce109">
                <text:p text:style-name="P9"><text:span text:style-name="T9">♣ </text:span><text:span text:style-name="T9">9 7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name="Espace réservé du pied de page 2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draw:frame draw:name="Tableau 8" draw:style-name="standard" xml:id="id64" draw:id="id64" draw:layer="layout" svg:width="8.399cm" svg:height="1.198cm" svg:x="16.1cm" svg:y="5.725cm">
          <table:table>
            <table:table-column table:style-name="co7"/>
            <table:table-row table:style-name="ro10">
              <table:table-cell table:style-name="ce110">
                <text:p text:style-name="P9"><text:span text:style-name="T8">Contrat 6</text:span><text:span text:style-name="T10">♠ ; entame R♥</text:span></text:p>
              </table:table-cell>
            </table:table-row>
          </table:table>
          <draw:image xlink:href="Pictures/TablePreview38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  <anim:animate smil:dur="1s" smil:fill="hold" smil:targetElement="id59" anim:sub-item="text" smil:attributeName="x" smil:values="x;x" smil:keyTimes="0;1"/>
                  <anim:animate smil:dur="1s" smil:fill="hold" smil:targetElement="id5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60" anim:sub-item="" smil:attributeName="visibility" smil:to="visible"/>
                  <anim:transitionFilter smil:dur="2s" smil:targetElement="id60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61" anim:sub-item="" smil:attributeName="visibility" smil:to="visible"/>
                  <anim:transitionFilter smil:dur="2s" smil:targetElement="id61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62" anim:sub-item="" smil:attributeName="visibility" smil:to="visible"/>
                  <anim:transitionFilter smil:dur="2s" smil:targetElement="id62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63" anim:sub-item="" smil:attributeName="visibility" smil:to="visible"/>
                  <anim:transitionFilter smil:dur="2s" smil:targetElement="id63" anim:sub-item="" smil:type="pinWheelWipe" smil:subtype="one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4" anim:sub-item="" smil:attributeName="visibility" smil:to="visible"/>
                  <anim:transitionFilter smil:dur="1s" smil:targetElement="id64" anim:sub-item="" smil:type="fade" smil:subtype="crossfade"/>
                  <anim:animate smil:dur="1s" smil:fill="hold" smil:targetElement="id64" anim:sub-item="" smil:attributeName="x" smil:values="x;x" smil:keyTimes="0;1"/>
                  <anim:animate smil:dur="1s" smil:fill="hold" smil:targetElement="id64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65" text:id="id65" text:style-name="P6"><text:span text:style-name="T6">B) Conditions de remise en main :</text:span></text:p>
            <text:p xml:id="id66" text:id="id66" text:style-name="P6"><text:span text:style-name="T6"><text:tab/></text:span><text:span text:style-name="T15">2°) A l’atout : exemple</text:span></text:p>
            <text:p text:style-name="P6"><text:span text:style-name="T6"/></text:p>
            <text:p text:style-name="P6"><text:span text:style-name="T7"/></text:p>
          </draw:text-box>
        </draw:frame>
        <draw:frame draw:name="Tableau 26" draw:style-name="standard" xml:id="id67" draw:id="id67" draw:layer="layout" svg:width="5.064cm" svg:height="5.078cm" svg:x="2.499cm" svg:y="6.925cm">
          <table:table>
            <table:table-column table:style-name="co1"/>
            <table:table-row table:style-name="ro1">
              <table:table-cell table:style-name="ce111">
                <text:p text:style-name="P8"><text:span text:style-name="T8">NORD</text:span></text:p>
              </table:table-cell>
            </table:table-row>
            <table:table-row table:style-name="ro2">
              <table:table-cell table:style-name="ce112">
                <text:p text:style-name="P9"><text:span text:style-name="T9">♠ </text:span><text:span text:style-name="T9">10 8 7 6</text:span></text:p>
              </table:table-cell>
            </table:table-row>
            <table:table-row table:style-name="ro2">
              <table:table-cell table:style-name="ce113">
                <text:p text:style-name="P9"><text:span text:style-name="T9">♥ </text:span><text:span text:style-name="T9">A D</text:span></text:p>
              </table:table-cell>
            </table:table-row>
            <table:table-row table:style-name="ro2">
              <table:table-cell table:style-name="ce114">
                <text:p text:style-name="P9"><text:span text:style-name="T9">♦ </text:span><text:span text:style-name="T9">R D 7 4</text:span></text:p>
              </table:table-cell>
            </table:table-row>
            <table:table-row table:style-name="ro3">
              <table:table-cell table:style-name="ce115">
                <text:p text:style-name="P9"><text:span text:style-name="T9">♣ </text:span><text:span text:style-name="T9">A 9 5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name="Tableau 27" draw:style-name="standard" xml:id="id68" draw:id="id68" draw:layer="layout" svg:width="5.799cm" svg:height="5.078cm" svg:x="2.499cm" svg:y="12.925cm">
          <table:table>
            <table:table-column table:style-name="co11"/>
            <table:table-row table:style-name="ro1">
              <table:table-cell table:style-name="ce116">
                <text:p text:style-name="P8"><text:span text:style-name="T8">SUD</text:span></text:p>
              </table:table-cell>
            </table:table-row>
            <table:table-row table:style-name="ro2">
              <table:table-cell table:style-name="ce117">
                <text:p text:style-name="P9"><text:span text:style-name="T9">♠ </text:span><text:span text:style-name="T9">A R 5 4 3 2</text:span></text:p>
              </table:table-cell>
            </table:table-row>
            <table:table-row table:style-name="ro2">
              <table:table-cell table:style-name="ce118">
                <text:p text:style-name="P9"><text:span text:style-name="T9">♥ </text:span><text:span text:style-name="T9">7 6 5</text:span></text:p>
              </table:table-cell>
            </table:table-row>
            <table:table-row table:style-name="ro2">
              <table:table-cell table:style-name="ce119">
                <text:p text:style-name="P9"><text:span text:style-name="T9">♦ </text:span><text:span text:style-name="T9">A 6</text:span></text:p>
              </table:table-cell>
            </table:table-row>
            <table:table-row table:style-name="ro3">
              <table:table-cell table:style-name="ce120">
                <text:p text:style-name="P9"><text:span text:style-name="T9">♣ </text:span><text:span text:style-name="T9">R 7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name="Tableau 2" draw:style-name="standard" xml:id="id69" draw:id="id69" draw:layer="layout" svg:width="8.399cm" svg:height="1.198cm" svg:x="9.5cm" svg:y="7.125cm">
          <table:table>
            <table:table-column table:style-name="co7"/>
            <table:table-row table:style-name="ro10">
              <table:table-cell table:style-name="ce121">
                <text:p text:style-name="P9"><text:span text:style-name="T8">Contrat 6</text:span><text:span text:style-name="T10">♠ ; entame V♣ 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name="Tableau 5" draw:style-name="standard" xml:id="id70" draw:id="id70" draw:layer="layout" svg:width="13.6cm" svg:height="1.398cm" svg:x="9.5cm" svg:y="9.125cm">
          <table:table>
            <table:table-column table:style-name="co8"/>
            <table:table-row table:style-name="ro4">
              <table:table-cell table:style-name="ce122">
                <text:p text:style-name="P9"><text:span text:style-name="T8">Plan de jeu : en principe une seule perdante à </text:span><text:span text:style-name="T10">♥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name="Tableau 6" draw:style-name="standard" xml:id="id71" draw:id="id71" draw:layer="layout" svg:width="13.953cm" svg:height="1.998cm" svg:x="9.5cm" svg:y="11.125cm">
          <table:table>
            <table:table-column table:style-name="co12"/>
            <table:table-row table:style-name="ro14">
              <table:table-cell table:style-name="ce123">
                <text:p text:style-name="P9"><text:span text:style-name="T8">On joue </text:span><text:span text:style-name="T10">A R ♠ ; </text:span><text:span text:style-name="T11">mauvaise nouvelle Ouest est chicane </text:span><text:span text:style-name="T10">♠ </text:span><text:span text:style-name="T11">ce qui entraine une seconde perdante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name="Tableau 7" draw:style-name="standard" xml:id="id72" draw:id="id72" draw:layer="layout" svg:width="15.2cm" svg:height="4.213cm" svg:x="9.3cm" svg:y="13.725cm">
          <table:table>
            <table:table-column table:style-name="co10"/>
            <table:table-row table:style-name="ro15">
              <table:table-cell table:style-name="ce124">
                <text:p text:style-name="P9"><text:span text:style-name="T16">La solution </text:span><text:span text:style-name="T8">: éliminer les </text:span><text:span text:style-name="T10">♣,</text:span><text:span text:style-name="T11">jouer A R </text:span><text:span text:style-name="T10">♦</text:span><text:span text:style-name="T11"> et D </text:span><text:span text:style-name="T10">♦</text:span><text:span text:style-name="T11"> en défaussant 1 </text:span><text:span text:style-name="T10">♥ </text:span><text:span text:style-name="T11">;</text:span><text:span text:style-name="T10"> </text:span><text:span text:style-name="T11">jouer le dernier </text:span><text:span text:style-name="T10">♦</text:span><text:span text:style-name="T11"> si Est coupe on défausse le dernier </text:span><text:span text:style-name="T10">♥ </text:span><text:span text:style-name="T11">sinon</text:span><text:span text:style-name="T12"> couper et remettre Est en main à l’atout. Celui-ci devra jouer </text:span><text:span text:style-name="T10">♥</text:span><text:span text:style-name="T12"> dans la fourchette A D ou jouer dans coupe et défausse.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name="Espace réservé du pied de page 4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  <anim:animate smil:dur="1s" smil:fill="hold" smil:targetElement="id65" anim:sub-item="text" smil:attributeName="x" smil:values="x;x" smil:keyTimes="0;1"/>
                  <anim:animate smil:dur="1s" smil:fill="hold" smil:targetElement="id6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  <anim:animate smil:dur="1s" smil:fill="hold" smil:targetElement="id66" anim:sub-item="text" smil:attributeName="x" smil:values="x;x" smil:keyTimes="0;1"/>
                  <anim:animate smil:dur="1s" smil:fill="hold" smil:targetElement="id66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67" anim:sub-item="" smil:attributeName="visibility" smil:to="visible"/>
                  <anim:animate smil:dur="1s" smil:fill="hold" smil:targetElement="id67" anim:sub-item="" smil:attributeName="width" smil:values="0;width" smil:keyTimes="0;1"/>
                  <anim:animate smil:dur="1s" smil:fill="hold" smil:targetElement="id67" anim:sub-item="" smil:attributeName="height" smil:values="0;height" smil:keyTimes="0;1"/>
                  <anim:animate smil:dur="1s" smil:fill="hold" smil:targetElement="id67" anim:sub-item="" smil:attributeName="rotate" smil:values="90;0" smil:keyTimes="0;1"/>
                  <anim:transitionFilter smil:dur="1s" smil:targetElement="id67" anim:sub-item="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68" anim:sub-item="" smil:attributeName="visibility" smil:to="visible"/>
                  <anim:animate smil:dur="1s" smil:fill="hold" smil:targetElement="id68" anim:sub-item="" smil:attributeName="width" smil:values="0;width" smil:keyTimes="0;1"/>
                  <anim:animate smil:dur="1s" smil:fill="hold" smil:targetElement="id68" anim:sub-item="" smil:attributeName="height" smil:values="0;height" smil:keyTimes="0;1"/>
                  <anim:animate smil:dur="1s" smil:fill="hold" smil:targetElement="id68" anim:sub-item="" smil:attributeName="rotate" smil:values="90;0" smil:keyTimes="0;1"/>
                  <anim:transitionFilter smil:dur="1s" smil:targetElement="id68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9" anim:sub-item="" smil:attributeName="visibility" smil:to="visible"/>
                  <anim:transitionFilter smil:dur="1s" smil:targetElement="id69" anim:sub-item="" smil:type="fade" smil:subtype="crossfade"/>
                  <anim:animate smil:dur="1s" smil:fill="hold" smil:targetElement="id69" anim:sub-item="" smil:attributeName="x" smil:values="x;x" smil:keyTimes="0;1"/>
                  <anim:animate smil:dur="1s" smil:fill="hold" smil:targetElement="id69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0" anim:sub-item="" smil:attributeName="visibility" smil:to="visible"/>
                  <anim:transitionFilter smil:dur="1s" smil:targetElement="id70" anim:sub-item="" smil:type="fade" smil:subtype="crossfade"/>
                  <anim:animate smil:dur="1s" smil:fill="hold" smil:targetElement="id70" anim:sub-item="" smil:attributeName="x" smil:values="x;x" smil:keyTimes="0;1"/>
                  <anim:animate smil:dur="1s" smil:fill="hold" smil:targetElement="id70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1" anim:sub-item="" smil:attributeName="visibility" smil:to="visible"/>
                  <anim:transitionFilter smil:dur="1s" smil:targetElement="id71" anim:sub-item="" smil:type="fade" smil:subtype="crossfade"/>
                  <anim:animate smil:dur="1s" smil:fill="hold" smil:targetElement="id71" anim:sub-item="" smil:attributeName="x" smil:values="x;x" smil:keyTimes="0;1"/>
                  <anim:animate smil:dur="1s" smil:fill="hold" smil:targetElement="id71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2" anim:sub-item="" smil:attributeName="visibility" smil:to="visible"/>
                  <anim:transitionFilter smil:dur="1s" smil:targetElement="id72" anim:sub-item="" smil:type="fade" smil:subtype="crossfade"/>
                  <anim:animate smil:dur="1s" smil:fill="hold" smil:targetElement="id72" anim:sub-item="" smil:attributeName="x" smil:values="x;x" smil:keyTimes="0;1"/>
                  <anim:animate smil:dur="1s" smil:fill="hold" smil:targetElement="id72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73" text:id="id73" text:style-name="P1"><text:span text:style-name="T6">Les 4 mains :</text:span></text:p>
            <text:p text:style-name="P6"><text:span text:style-name="T7"/></text:p>
          </draw:text-box>
        </draw:frame>
        <draw:frame draw:name="Tableau 26" draw:style-name="standard" xml:id="id74" draw:id="id74" draw:layer="layout" svg:width="5.064cm" svg:height="5.078cm" svg:x="10.3cm" svg:y="5.525cm">
          <table:table>
            <table:table-column table:style-name="co1"/>
            <table:table-row table:style-name="ro1">
              <table:table-cell table:style-name="ce125">
                <text:p text:style-name="P8"><text:span text:style-name="T8">NORD</text:span></text:p>
              </table:table-cell>
            </table:table-row>
            <table:table-row table:style-name="ro2">
              <table:table-cell table:style-name="ce126">
                <text:p text:style-name="P9"><text:span text:style-name="T9">♠ </text:span><text:span text:style-name="T9">10 8 7 6</text:span></text:p>
              </table:table-cell>
            </table:table-row>
            <table:table-row table:style-name="ro2">
              <table:table-cell table:style-name="ce127">
                <text:p text:style-name="P9"><text:span text:style-name="T9">♥ </text:span><text:span text:style-name="T9">A D</text:span></text:p>
              </table:table-cell>
            </table:table-row>
            <table:table-row table:style-name="ro2">
              <table:table-cell table:style-name="ce128">
                <text:p text:style-name="P9"><text:span text:style-name="T9">♦ </text:span><text:span text:style-name="T9">R D 7 4</text:span></text:p>
              </table:table-cell>
            </table:table-row>
            <table:table-row table:style-name="ro3">
              <table:table-cell table:style-name="ce129">
                <text:p text:style-name="P9"><text:span text:style-name="T9">♣ </text:span><text:span text:style-name="T9">A 9 5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name="Tableau 27" draw:style-name="standard" xml:id="id76" draw:id="id76" draw:layer="layout" svg:width="5.599cm" svg:height="5.078cm" svg:x="10.5cm" svg:y="12.325cm">
          <table:table>
            <table:table-column table:style-name="co13"/>
            <table:table-row table:style-name="ro1">
              <table:table-cell table:style-name="ce130">
                <text:p text:style-name="P8"><text:span text:style-name="T8">SUD</text:span></text:p>
              </table:table-cell>
            </table:table-row>
            <table:table-row table:style-name="ro2">
              <table:table-cell table:style-name="ce131">
                <text:p text:style-name="P9"><text:span text:style-name="T9">♠ </text:span><text:span text:style-name="T9">A R 5 4 3 2</text:span></text:p>
              </table:table-cell>
            </table:table-row>
            <table:table-row table:style-name="ro2">
              <table:table-cell table:style-name="ce132">
                <text:p text:style-name="P9"><text:span text:style-name="T9">♥ </text:span><text:span text:style-name="T9">7 6 5</text:span></text:p>
              </table:table-cell>
            </table:table-row>
            <table:table-row table:style-name="ro2">
              <table:table-cell table:style-name="ce133">
                <text:p text:style-name="P9"><text:span text:style-name="T9">♦ </text:span><text:span text:style-name="T9">A 6</text:span></text:p>
              </table:table-cell>
            </table:table-row>
            <table:table-row table:style-name="ro3">
              <table:table-cell table:style-name="ce134">
                <text:p text:style-name="P9"><text:span text:style-name="T9">♣ </text:span><text:span text:style-name="T9">R 7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name="Tableau 9" draw:style-name="standard" xml:id="id75" draw:id="id75" draw:layer="layout" svg:width="5.064cm" svg:height="5.649cm" svg:x="4.499cm" svg:y="9.125cm">
          <table:table>
            <table:table-column table:style-name="co1"/>
            <table:table-row table:style-name="ro9">
              <table:table-cell table:style-name="ce135">
                <text:p text:style-name="P8"><text:span text:style-name="T8">OUEST</text:span></text:p>
              </table:table-cell>
            </table:table-row>
            <table:table-row table:style-name="ro12">
              <table:table-cell table:style-name="ce136">
                <text:p text:style-name="P9"><text:span text:style-name="T9">♠ </text:span></text:p>
              </table:table-cell>
            </table:table-row>
            <table:table-row table:style-name="ro12">
              <table:table-cell table:style-name="ce137">
                <text:p text:style-name="P9"><text:span text:style-name="T9">♥ </text:span><text:span text:style-name="T9">V 9 4 3 2</text:span></text:p>
              </table:table-cell>
            </table:table-row>
            <table:table-row table:style-name="ro12">
              <table:table-cell table:style-name="ce138">
                <text:p text:style-name="P9"><text:span text:style-name="T9">♦ </text:span><text:span text:style-name="T9">10 9 5</text:span></text:p>
              </table:table-cell>
            </table:table-row>
            <table:table-row table:style-name="ro13">
              <table:table-cell table:style-name="ce139">
                <text:p text:style-name="P9"><text:span text:style-name="T9">♣ </text:span><text:span text:style-name="T9">V 10 8 6 3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name="Tableau 10" draw:style-name="standard" xml:id="id77" draw:id="id77" draw:layer="layout" svg:width="5.064cm" svg:height="5.078cm" svg:x="16.7cm" svg:y="9.325cm">
          <table:table>
            <table:table-column table:style-name="co1"/>
            <table:table-row table:style-name="ro1">
              <table:table-cell table:style-name="ce140">
                <text:p text:style-name="P8"><text:span text:style-name="T8">EST</text:span></text:p>
              </table:table-cell>
            </table:table-row>
            <table:table-row table:style-name="ro2">
              <table:table-cell table:style-name="ce141">
                <text:p text:style-name="P9"><text:span text:style-name="T9">♠ </text:span><text:span text:style-name="T9">D V 9</text:span></text:p>
              </table:table-cell>
            </table:table-row>
            <table:table-row table:style-name="ro2">
              <table:table-cell table:style-name="ce142">
                <text:p text:style-name="P9"><text:span text:style-name="T9">♥ </text:span><text:span text:style-name="T9">R 10 8</text:span></text:p>
              </table:table-cell>
            </table:table-row>
            <table:table-row table:style-name="ro2">
              <table:table-cell table:style-name="ce143">
                <text:p text:style-name="P9"><text:span text:style-name="T9">♦ </text:span><text:span text:style-name="T9">V 8 3 2</text:span></text:p>
              </table:table-cell>
            </table:table-row>
            <table:table-row table:style-name="ro3">
              <table:table-cell table:style-name="ce144">
                <text:p text:style-name="P9"><text:span text:style-name="T9">♣ </text:span><text:span text:style-name="T9">D 4 2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name="Espace réservé du pied de page 2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draw:frame draw:name="Tableau 8" draw:style-name="standard" xml:id="id78" draw:id="id78" draw:layer="layout" svg:width="8.399cm" svg:height="1.198cm" svg:x="16.1cm" svg:y="5.525cm">
          <table:table>
            <table:table-column table:style-name="co7"/>
            <table:table-row table:style-name="ro10">
              <table:table-cell table:style-name="ce145">
                <text:p text:style-name="P9"><text:span text:style-name="T8">Contrat 6</text:span><text:span text:style-name="T10">♠ ; entame V♣ </text:span></text:p>
              </table:table-cell>
            </table:table-row>
          </table:table>
          <draw:image xlink:href="Pictures/TablePreview49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  <anim:animate smil:dur="1s" smil:fill="hold" smil:targetElement="id73" anim:sub-item="text" smil:attributeName="x" smil:values="x;x" smil:keyTimes="0;1"/>
                  <anim:animate smil:dur="1s" smil:fill="hold" smil:targetElement="id7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74" anim:sub-item="" smil:attributeName="visibility" smil:to="visible"/>
                  <anim:transitionFilter smil:dur="2s" smil:targetElement="id74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75" anim:sub-item="" smil:attributeName="visibility" smil:to="visible"/>
                  <anim:transitionFilter smil:dur="2s" smil:targetElement="id75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76" anim:sub-item="" smil:attributeName="visibility" smil:to="visible"/>
                  <anim:transitionFilter smil:dur="2s" smil:targetElement="id76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77" anim:sub-item="" smil:attributeName="visibility" smil:to="visible"/>
                  <anim:transitionFilter smil:dur="2s" smil:targetElement="id77" anim:sub-item="" smil:type="pinWheelWipe" smil:subtype="one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8" anim:sub-item="" smil:attributeName="visibility" smil:to="visible"/>
                  <anim:transitionFilter smil:dur="1s" smil:targetElement="id78" anim:sub-item="" smil:type="fade" smil:subtype="crossfade"/>
                  <anim:animate smil:dur="1s" smil:fill="hold" smil:targetElement="id78" anim:sub-item="" smil:attributeName="x" smil:values="x;x" smil:keyTimes="0;1"/>
                  <anim:animate smil:dur="1s" smil:fill="hold" smil:targetElement="id78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79" text:id="id79" text:style-name="P6"><text:span text:style-name="T6">B) Conditions de remise en main :</text:span></text:p>
            <text:p xml:id="id80" text:id="id80" text:style-name="P6"><text:span text:style-name="T6"><text:tab/></text:span><text:span text:style-name="T15">3°) En perdante sur perdante : exemple</text:span></text:p>
            <text:p text:style-name="P6"><text:span text:style-name="T6"/></text:p>
            <text:p text:style-name="P6"><text:span text:style-name="T7"/></text:p>
          </draw:text-box>
        </draw:frame>
        <draw:frame draw:name="Tableau 26" draw:style-name="standard" xml:id="id81" draw:id="id81" draw:layer="layout" svg:width="5.064cm" svg:height="5.078cm" svg:x="2.499cm" svg:y="6.925cm">
          <table:table>
            <table:table-column table:style-name="co1"/>
            <table:table-row table:style-name="ro1">
              <table:table-cell table:style-name="ce146">
                <text:p text:style-name="P8"><text:span text:style-name="T8">NORD</text:span></text:p>
              </table:table-cell>
            </table:table-row>
            <table:table-row table:style-name="ro2">
              <table:table-cell table:style-name="ce147">
                <text:p text:style-name="P9"><text:span text:style-name="T9">♠ </text:span><text:span text:style-name="T9">D 7 4 2</text:span></text:p>
              </table:table-cell>
            </table:table-row>
            <table:table-row table:style-name="ro2">
              <table:table-cell table:style-name="ce148">
                <text:p text:style-name="P9"><text:span text:style-name="T9">♥ </text:span><text:span text:style-name="T9">A 8 6 4</text:span></text:p>
              </table:table-cell>
            </table:table-row>
            <table:table-row table:style-name="ro2">
              <table:table-cell table:style-name="ce149">
                <text:p text:style-name="P9"><text:span text:style-name="T9">♦ </text:span><text:span text:style-name="T9">A 7 </text:span></text:p>
              </table:table-cell>
            </table:table-row>
            <table:table-row table:style-name="ro3">
              <table:table-cell table:style-name="ce150">
                <text:p text:style-name="P9"><text:span text:style-name="T9">♣ </text:span><text:span text:style-name="T9">8 3 2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name="Tableau 27" draw:style-name="standard" xml:id="id82" draw:id="id82" draw:layer="layout" svg:width="5.799cm" svg:height="5.078cm" svg:x="2.499cm" svg:y="12.925cm">
          <table:table>
            <table:table-column table:style-name="co11"/>
            <table:table-row table:style-name="ro1">
              <table:table-cell table:style-name="ce151">
                <text:p text:style-name="P8"><text:span text:style-name="T8">SUD</text:span></text:p>
              </table:table-cell>
            </table:table-row>
            <table:table-row table:style-name="ro2">
              <table:table-cell table:style-name="ce152">
                <text:p text:style-name="P9"><text:span text:style-name="T9">♠ </text:span><text:span text:style-name="T9">A R V 6 5</text:span></text:p>
              </table:table-cell>
            </table:table-row>
            <table:table-row table:style-name="ro2">
              <table:table-cell table:style-name="ce153">
                <text:p text:style-name="P9"><text:span text:style-name="T9">♥ </text:span><text:span text:style-name="T9">R D 5</text:span></text:p>
              </table:table-cell>
            </table:table-row>
            <table:table-row table:style-name="ro2">
              <table:table-cell table:style-name="ce154">
                <text:p text:style-name="P9"><text:span text:style-name="T9">♦ </text:span><text:span text:style-name="T9">R 5</text:span></text:p>
              </table:table-cell>
            </table:table-row>
            <table:table-row table:style-name="ro3">
              <table:table-cell table:style-name="ce155">
                <text:p text:style-name="P9"><text:span text:style-name="T9">♣ </text:span><text:span text:style-name="T9">A D 7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name="Tableau 2" draw:style-name="standard" xml:id="id83" draw:id="id83" draw:layer="layout" svg:width="8.399cm" svg:height="1.198cm" svg:x="9.5cm" svg:y="6.925cm">
          <table:table>
            <table:table-column table:style-name="co7"/>
            <table:table-row table:style-name="ro10">
              <table:table-cell table:style-name="ce156">
                <text:p text:style-name="P9"><text:span text:style-name="T8">Contrat 6</text:span><text:span text:style-name="T10">♠ ; entame D♦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name="Tableau 5" draw:style-name="standard" xml:id="id84" draw:id="id84" draw:layer="layout" svg:width="13.6cm" svg:height="2.642cm" svg:x="9.5cm" svg:y="8.525cm">
          <table:table>
            <table:table-column table:style-name="co8"/>
            <table:table-row table:style-name="ro16">
              <table:table-cell table:style-name="ce157">
                <text:p text:style-name="P9"><text:span text:style-name="T16">Plan de jeu </text:span><text:span text:style-name="T8">: 2 perdantes à <text:s/></text:span><text:span text:style-name="T10">♣ </text:span><text:span text:style-name="T12">; possibilité de trouver les </text:span><text:span text:style-name="T10">♥ </text:span><text:span text:style-name="T12">3/3 en flanc ; le roi de </text:span><text:span text:style-name="T10">♣</text:span><text:span text:style-name="T12"> <text:s/>placé ou obliger Ouest à jouer </text:span><text:span text:style-name="T10">♣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name="Tableau 6" draw:style-name="standard" xml:id="id85" draw:id="id85" draw:layer="layout" svg:width="13.953cm" svg:height="2.642cm" svg:x="9.5cm" svg:y="11.525cm">
          <table:table>
            <table:table-column table:style-name="co12"/>
            <table:table-row table:style-name="ro16">
              <table:table-cell table:style-name="ce158">
                <text:p text:style-name="P9"><text:span text:style-name="T8">On fait tomber les atouts, on élimine les </text:span><text:span text:style-name="T10">♦ </text:span><text:span text:style-name="T12">et on joue </text:span><text:span text:style-name="T10">♥;</text:span><text:span text:style-name="T11">mauvaise nouvelle ils ne sont pas 3/3 ; Ouest possède 4 cartes à </text:span><text:span text:style-name="T10">♥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name="Tableau 7" draw:style-name="standard" xml:id="id86" draw:id="id86" draw:layer="layout" svg:width="15.2cm" svg:height="3.436cm" svg:x="9.3cm" svg:y="14.326cm">
          <table:table>
            <table:table-column table:style-name="co10"/>
            <table:table-row table:style-name="ro17">
              <table:table-cell table:style-name="ce159">
                <text:p text:style-name="P9"><text:span text:style-name="T16">La solution </text:span><text:span text:style-name="T8">: </text:span></text:p>
                <text:p text:style-name="P9"><text:span text:style-name="T8">Sur le 4ième <text:s/></text:span><text:span text:style-name="T10">♥</text:span><text:span text:style-name="T12"> jeter 1 </text:span><text:span text:style-name="T10">♣ </text:span><text:span text:style-name="T12">(perdante sur perdante)</text:span></text:p>
                <text:p text:style-name="P9"><text:span text:style-name="T12">Ouest en main devra jouer </text:span><text:span text:style-name="T10">♣</text:span><text:span text:style-name="T12"> dans la fourchette A D ou coupe et défausse.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name="Espace réservé du pied de page 4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  <anim:animate smil:dur="1s" smil:fill="hold" smil:targetElement="id79" anim:sub-item="text" smil:attributeName="x" smil:values="x;x" smil:keyTimes="0;1"/>
                  <anim:animate smil:dur="1s" smil:fill="hold" smil:targetElement="id7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  <anim:animate smil:dur="1s" smil:fill="hold" smil:targetElement="id80" anim:sub-item="text" smil:attributeName="x" smil:values="x;x" smil:keyTimes="0;1"/>
                  <anim:animate smil:dur="1s" smil:fill="hold" smil:targetElement="id8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81" anim:sub-item="" smil:attributeName="visibility" smil:to="visible"/>
                  <anim:animate smil:dur="1s" smil:fill="hold" smil:targetElement="id81" anim:sub-item="" smil:attributeName="width" smil:values="0;width" smil:keyTimes="0;1"/>
                  <anim:animate smil:dur="1s" smil:fill="hold" smil:targetElement="id81" anim:sub-item="" smil:attributeName="height" smil:values="0;height" smil:keyTimes="0;1"/>
                  <anim:animate smil:dur="1s" smil:fill="hold" smil:targetElement="id81" anim:sub-item="" smil:attributeName="rotate" smil:values="90;0" smil:keyTimes="0;1"/>
                  <anim:transitionFilter smil:dur="1s" smil:targetElement="id81" anim:sub-item="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82" anim:sub-item="" smil:attributeName="visibility" smil:to="visible"/>
                  <anim:animate smil:dur="1s" smil:fill="hold" smil:targetElement="id82" anim:sub-item="" smil:attributeName="width" smil:values="0;width" smil:keyTimes="0;1"/>
                  <anim:animate smil:dur="1s" smil:fill="hold" smil:targetElement="id82" anim:sub-item="" smil:attributeName="height" smil:values="0;height" smil:keyTimes="0;1"/>
                  <anim:animate smil:dur="1s" smil:fill="hold" smil:targetElement="id82" anim:sub-item="" smil:attributeName="rotate" smil:values="90;0" smil:keyTimes="0;1"/>
                  <anim:transitionFilter smil:dur="1s" smil:targetElement="id8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3" anim:sub-item="" smil:attributeName="visibility" smil:to="visible"/>
                  <anim:transitionFilter smil:dur="1s" smil:targetElement="id83" anim:sub-item="" smil:type="fade" smil:subtype="crossfade"/>
                  <anim:animate smil:dur="1s" smil:fill="hold" smil:targetElement="id83" anim:sub-item="" smil:attributeName="x" smil:values="x;x" smil:keyTimes="0;1"/>
                  <anim:animate smil:dur="1s" smil:fill="hold" smil:targetElement="id83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4" anim:sub-item="" smil:attributeName="visibility" smil:to="visible"/>
                  <anim:transitionFilter smil:dur="1s" smil:targetElement="id84" anim:sub-item="" smil:type="fade" smil:subtype="crossfade"/>
                  <anim:animate smil:dur="1s" smil:fill="hold" smil:targetElement="id84" anim:sub-item="" smil:attributeName="x" smil:values="x;x" smil:keyTimes="0;1"/>
                  <anim:animate smil:dur="1s" smil:fill="hold" smil:targetElement="id84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5" anim:sub-item="" smil:attributeName="visibility" smil:to="visible"/>
                  <anim:transitionFilter smil:dur="1s" smil:targetElement="id85" anim:sub-item="" smil:type="fade" smil:subtype="crossfade"/>
                  <anim:animate smil:dur="1s" smil:fill="hold" smil:targetElement="id85" anim:sub-item="" smil:attributeName="x" smil:values="x;x" smil:keyTimes="0;1"/>
                  <anim:animate smil:dur="1s" smil:fill="hold" smil:targetElement="id85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6" anim:sub-item="" smil:attributeName="visibility" smil:to="visible"/>
                  <anim:transitionFilter smil:dur="1s" smil:targetElement="id86" anim:sub-item="" smil:type="fade" smil:subtype="crossfade"/>
                  <anim:animate smil:dur="1s" smil:fill="hold" smil:targetElement="id86" anim:sub-item="" smil:attributeName="x" smil:values="x;x" smil:keyTimes="0;1"/>
                  <anim:animate smil:dur="1s" smil:fill="hold" smil:targetElement="id86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87" text:id="id87" text:style-name="P1"><text:span text:style-name="T6">Les 4 mains :</text:span></text:p>
            <text:p text:style-name="P6"><text:span text:style-name="T7"/></text:p>
          </draw:text-box>
        </draw:frame>
        <draw:frame draw:name="Tableau 26" draw:style-name="standard" xml:id="id88" draw:id="id88" draw:layer="layout" svg:width="5.064cm" svg:height="5.078cm" svg:x="10.3cm" svg:y="5.525cm">
          <table:table>
            <table:table-column table:style-name="co1"/>
            <table:table-row table:style-name="ro1">
              <table:table-cell table:style-name="ce160">
                <text:p text:style-name="P8"><text:span text:style-name="T8">NORD</text:span></text:p>
              </table:table-cell>
            </table:table-row>
            <table:table-row table:style-name="ro2">
              <table:table-cell table:style-name="ce161">
                <text:p text:style-name="P9"><text:span text:style-name="T9">♠ </text:span><text:span text:style-name="T9">D 7 4 2</text:span></text:p>
              </table:table-cell>
            </table:table-row>
            <table:table-row table:style-name="ro2">
              <table:table-cell table:style-name="ce162">
                <text:p text:style-name="P9"><text:span text:style-name="T9">♥ </text:span><text:span text:style-name="T9">A 8 6 3</text:span></text:p>
              </table:table-cell>
            </table:table-row>
            <table:table-row table:style-name="ro2">
              <table:table-cell table:style-name="ce163">
                <text:p text:style-name="P9"><text:span text:style-name="T9">♦ </text:span><text:span text:style-name="T9">A 7 </text:span></text:p>
              </table:table-cell>
            </table:table-row>
            <table:table-row table:style-name="ro3">
              <table:table-cell table:style-name="ce164">
                <text:p text:style-name="P9"><text:span text:style-name="T9">♣ </text:span><text:span text:style-name="T9">8 3 2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name="Tableau 27" draw:style-name="standard" xml:id="id90" draw:id="id90" draw:layer="layout" svg:width="5.599cm" svg:height="5.078cm" svg:x="10.5cm" svg:y="12.325cm">
          <table:table>
            <table:table-column table:style-name="co13"/>
            <table:table-row table:style-name="ro1">
              <table:table-cell table:style-name="ce165">
                <text:p text:style-name="P8"><text:span text:style-name="T8">SUD</text:span></text:p>
              </table:table-cell>
            </table:table-row>
            <table:table-row table:style-name="ro2">
              <table:table-cell table:style-name="ce166">
                <text:p text:style-name="P9"><text:span text:style-name="T9">♠ </text:span><text:span text:style-name="T9">A R V 6 5</text:span></text:p>
              </table:table-cell>
            </table:table-row>
            <table:table-row table:style-name="ro2">
              <table:table-cell table:style-name="ce167">
                <text:p text:style-name="P9"><text:span text:style-name="T9">♥ </text:span><text:span text:style-name="T9">R D 5 </text:span></text:p>
              </table:table-cell>
            </table:table-row>
            <table:table-row table:style-name="ro2">
              <table:table-cell table:style-name="ce168">
                <text:p text:style-name="P9"><text:span text:style-name="T9">♦ </text:span><text:span text:style-name="T9">R 5</text:span></text:p>
              </table:table-cell>
            </table:table-row>
            <table:table-row table:style-name="ro3">
              <table:table-cell table:style-name="ce169">
                <text:p text:style-name="P9"><text:span text:style-name="T9">♣ </text:span><text:span text:style-name="T9">A D 7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name="Tableau 9" draw:style-name="standard" xml:id="id89" draw:id="id89" draw:layer="layout" svg:width="5.064cm" svg:height="5.078cm" svg:x="4.499cm" svg:y="9.125cm">
          <table:table>
            <table:table-column table:style-name="co1"/>
            <table:table-row table:style-name="ro1">
              <table:table-cell table:style-name="ce170">
                <text:p text:style-name="P8"><text:span text:style-name="T8">OUEST</text:span></text:p>
              </table:table-cell>
            </table:table-row>
            <table:table-row table:style-name="ro2">
              <table:table-cell table:style-name="ce171">
                <text:p text:style-name="P9"><text:span text:style-name="T9">♠ </text:span><text:span text:style-name="T9">3</text:span></text:p>
              </table:table-cell>
            </table:table-row>
            <table:table-row table:style-name="ro2">
              <table:table-cell table:style-name="ce172">
                <text:p text:style-name="P9"><text:span text:style-name="T9">♥ </text:span><text:span text:style-name="T9">V 9 7 4 </text:span></text:p>
              </table:table-cell>
            </table:table-row>
            <table:table-row table:style-name="ro2">
              <table:table-cell table:style-name="ce173">
                <text:p text:style-name="P9"><text:span text:style-name="T9">♦ </text:span><text:span text:style-name="T9">D V 9 2</text:span></text:p>
              </table:table-cell>
            </table:table-row>
            <table:table-row table:style-name="ro3">
              <table:table-cell table:style-name="ce174">
                <text:p text:style-name="P9"><text:span text:style-name="T9">♣ </text:span><text:span text:style-name="T9">R V 9 6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name="Tableau 10" draw:style-name="standard" xml:id="id91" draw:id="id91" draw:layer="layout" svg:width="5.064cm" svg:height="5.649cm" svg:x="16.7cm" svg:y="9.325cm">
          <table:table>
            <table:table-column table:style-name="co1"/>
            <table:table-row table:style-name="ro9">
              <table:table-cell table:style-name="ce175">
                <text:p text:style-name="P8"><text:span text:style-name="T8">EST</text:span></text:p>
              </table:table-cell>
            </table:table-row>
            <table:table-row table:style-name="ro12">
              <table:table-cell table:style-name="ce176">
                <text:p text:style-name="P9"><text:span text:style-name="T9">♠ </text:span><text:span text:style-name="T9">10 9 8</text:span></text:p>
              </table:table-cell>
            </table:table-row>
            <table:table-row table:style-name="ro12">
              <table:table-cell table:style-name="ce177">
                <text:p text:style-name="P9"><text:span text:style-name="T9">♥ </text:span><text:span text:style-name="T9">10 2</text:span></text:p>
              </table:table-cell>
            </table:table-row>
            <table:table-row table:style-name="ro13">
              <table:table-cell table:style-name="ce178">
                <text:p text:style-name="P9"><text:span text:style-name="T9">♦ </text:span><text:span text:style-name="T9">10 8 6 4 3</text:span></text:p>
              </table:table-cell>
            </table:table-row>
            <table:table-row table:style-name="ro12">
              <table:table-cell table:style-name="ce179">
                <text:p text:style-name="P9"><text:span text:style-name="T9">♣ </text:span><text:span text:style-name="T9">10 5 4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name="Espace réservé du pied de page 2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draw:frame draw:name="Tableau 8" draw:style-name="standard" xml:id="id92" draw:id="id92" draw:layer="layout" svg:width="8.399cm" svg:height="1.198cm" svg:x="16.1cm" svg:y="5.525cm">
          <table:table>
            <table:table-column table:style-name="co7"/>
            <table:table-row table:style-name="ro10">
              <table:table-cell table:style-name="ce180">
                <text:p text:style-name="P9"><text:span text:style-name="T8">Contrat 6</text:span><text:span text:style-name="T10">♠ ; entame D♦</text:span></text:p>
              </table:table-cell>
            </table:table-row>
          </table:table>
          <draw:image xlink:href="Pictures/TablePreview60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  <anim:animate smil:dur="1s" smil:fill="hold" smil:targetElement="id87" anim:sub-item="text" smil:attributeName="x" smil:values="x;x" smil:keyTimes="0;1"/>
                  <anim:animate smil:dur="1s" smil:fill="hold" smil:targetElement="id8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88" anim:sub-item="" smil:attributeName="visibility" smil:to="visible"/>
                  <anim:transitionFilter smil:dur="2s" smil:targetElement="id88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89" anim:sub-item="" smil:attributeName="visibility" smil:to="visible"/>
                  <anim:transitionFilter smil:dur="2s" smil:targetElement="id89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90" anim:sub-item="" smil:attributeName="visibility" smil:to="visible"/>
                  <anim:transitionFilter smil:dur="2s" smil:targetElement="id90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91" anim:sub-item="" smil:attributeName="visibility" smil:to="visible"/>
                  <anim:transitionFilter smil:dur="2s" smil:targetElement="id91" anim:sub-item="" smil:type="pinWheelWipe" smil:subtype="one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2" anim:sub-item="" smil:attributeName="visibility" smil:to="visible"/>
                  <anim:transitionFilter smil:dur="1s" smil:targetElement="id92" anim:sub-item="" smil:type="fade" smil:subtype="crossfade"/>
                  <anim:animate smil:dur="1s" smil:fill="hold" smil:targetElement="id92" anim:sub-item="" smil:attributeName="x" smil:values="x;x" smil:keyTimes="0;1"/>
                  <anim:animate smil:dur="1s" smil:fill="hold" smil:targetElement="id92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93" text:id="id93" text:style-name="P6"><text:span text:style-name="T6">B) Conditions de remise en main :</text:span></text:p>
            <text:p xml:id="id94" text:id="id94" text:style-name="P6"><text:span text:style-name="T6"><text:tab/></text:span><text:span text:style-name="T15">4°) En sortie interne : exemple</text:span></text:p>
            <text:p text:style-name="P6"><text:span text:style-name="T6"/></text:p>
            <text:p text:style-name="P6"><text:span text:style-name="T7"/></text:p>
          </draw:text-box>
        </draw:frame>
        <draw:frame draw:name="Tableau 26" draw:style-name="standard" xml:id="id95" draw:id="id95" draw:layer="layout" svg:width="5.064cm" svg:height="5.078cm" svg:x="2.499cm" svg:y="6.925cm">
          <table:table>
            <table:table-column table:style-name="co1"/>
            <table:table-row table:style-name="ro1">
              <table:table-cell table:style-name="ce181">
                <text:p text:style-name="P8"><text:span text:style-name="T8">NORD</text:span></text:p>
              </table:table-cell>
            </table:table-row>
            <table:table-row table:style-name="ro2">
              <table:table-cell table:style-name="ce182">
                <text:p text:style-name="P9"><text:span text:style-name="T9">♠ </text:span><text:span text:style-name="T9">R 7 6</text:span></text:p>
              </table:table-cell>
            </table:table-row>
            <table:table-row table:style-name="ro2">
              <table:table-cell table:style-name="ce183">
                <text:p text:style-name="P9"><text:span text:style-name="T9">♥ </text:span><text:span text:style-name="T9">A D V 2</text:span></text:p>
              </table:table-cell>
            </table:table-row>
            <table:table-row table:style-name="ro2">
              <table:table-cell table:style-name="ce184">
                <text:p text:style-name="P9"><text:span text:style-name="T9">♦ </text:span><text:span text:style-name="T9">A D 6</text:span></text:p>
              </table:table-cell>
            </table:table-row>
            <table:table-row table:style-name="ro3">
              <table:table-cell table:style-name="ce185">
                <text:p text:style-name="P9"><text:span text:style-name="T9">♣ </text:span><text:span text:style-name="T9">A 4 3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name="Tableau 27" draw:style-name="standard" xml:id="id96" draw:id="id96" draw:layer="layout" svg:width="5.799cm" svg:height="5.078cm" svg:x="2.499cm" svg:y="12.925cm">
          <table:table>
            <table:table-column table:style-name="co11"/>
            <table:table-row table:style-name="ro1">
              <table:table-cell table:style-name="ce186">
                <text:p text:style-name="P8"><text:span text:style-name="T8">SUD</text:span></text:p>
              </table:table-cell>
            </table:table-row>
            <table:table-row table:style-name="ro2">
              <table:table-cell table:style-name="ce187">
                <text:p text:style-name="P9"><text:span text:style-name="T9">♠ </text:span><text:span text:style-name="T9">A 2 </text:span></text:p>
              </table:table-cell>
            </table:table-row>
            <table:table-row table:style-name="ro2">
              <table:table-cell table:style-name="ce188">
                <text:p text:style-name="P9"><text:span text:style-name="T9">♥ </text:span><text:span text:style-name="T9">R 10 8 5 4</text:span></text:p>
              </table:table-cell>
            </table:table-row>
            <table:table-row table:style-name="ro2">
              <table:table-cell table:style-name="ce189">
                <text:p text:style-name="P9"><text:span text:style-name="T9">♦ </text:span><text:span text:style-name="T9">R V 9</text:span></text:p>
              </table:table-cell>
            </table:table-row>
            <table:table-row table:style-name="ro3">
              <table:table-cell table:style-name="ce190">
                <text:p text:style-name="P9"><text:span text:style-name="T9">♣ </text:span><text:span text:style-name="T9">V 10 9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name="Tableau 2" draw:style-name="standard" xml:id="id97" draw:id="id97" draw:layer="layout" svg:width="8.399cm" svg:height="1.198cm" svg:x="9.7cm" svg:y="6.925cm">
          <table:table>
            <table:table-column table:style-name="co7"/>
            <table:table-row table:style-name="ro10">
              <table:table-cell table:style-name="ce191">
                <text:p text:style-name="P9"><text:span text:style-name="T8">Contrat 6</text:span><text:span text:style-name="T10">♥; entame D♠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name="Tableau 5" draw:style-name="standard" xml:id="id98" draw:id="id98" draw:layer="layout" svg:width="8.399cm" svg:height="1.198cm" svg:x="9.7cm" svg:y="9.525cm">
          <table:table>
            <table:table-column table:style-name="co7"/>
            <table:table-row table:style-name="ro10">
              <table:table-cell table:style-name="ce192">
                <text:p text:style-name="P9"><text:span text:style-name="T16">Plan de jeu </text:span><text:span text:style-name="T8">: 2 perdantes à <text:s/></text:span><text:span text:style-name="T10">♣ 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name="Tableau 7" draw:style-name="standard" xml:id="id99" draw:id="id99" draw:layer="layout" svg:width="10.399cm" svg:height="4.599cm" svg:x="9.7cm" svg:y="11.925cm">
          <table:table>
            <table:table-column table:style-name="co14"/>
            <table:table-row table:style-name="ro18">
              <table:table-cell table:style-name="ce193">
                <text:p text:style-name="P9"><text:span text:style-name="T16">La solution </text:span><text:span text:style-name="T8">: </text:span></text:p>
                <text:p text:style-name="P9"><text:span text:style-name="T8">On fait tomber les atouts, on élimine les </text:span><text:span text:style-name="T10">♠ </text:span><text:span text:style-name="T12">et les </text:span><text:span text:style-name="T10">♦ </text:span><text:span text:style-name="T11">et</text:span><text:span text:style-name="T10"> </text:span><text:span text:style-name="T12">on joue V</text:span><text:span text:style-name="T10">♣</text:span><text:span text:style-name="T12"> (</text:span><text:span text:style-name="T11">en sortie interne). Est en main devra rejouer </text:span><text:span text:style-name="T10">♣ </text:span><text:span text:style-name="T11">ou coupe et défausse.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name="Espace réservé du pied de page 4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  <anim:animate smil:dur="1s" smil:fill="hold" smil:targetElement="id93" anim:sub-item="text" smil:attributeName="x" smil:values="x;x" smil:keyTimes="0;1"/>
                  <anim:animate smil:dur="1s" smil:fill="hold" smil:targetElement="id9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  <anim:animate smil:dur="1s" smil:fill="hold" smil:targetElement="id94" anim:sub-item="text" smil:attributeName="x" smil:values="x;x" smil:keyTimes="0;1"/>
                  <anim:animate smil:dur="1s" smil:fill="hold" smil:targetElement="id9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95" anim:sub-item="" smil:attributeName="visibility" smil:to="visible"/>
                  <anim:animate smil:dur="1s" smil:fill="hold" smil:targetElement="id95" anim:sub-item="" smil:attributeName="width" smil:values="0;width" smil:keyTimes="0;1"/>
                  <anim:animate smil:dur="1s" smil:fill="hold" smil:targetElement="id95" anim:sub-item="" smil:attributeName="height" smil:values="0;height" smil:keyTimes="0;1"/>
                  <anim:animate smil:dur="1s" smil:fill="hold" smil:targetElement="id95" anim:sub-item="" smil:attributeName="rotate" smil:values="90;0" smil:keyTimes="0;1"/>
                  <anim:transitionFilter smil:dur="1s" smil:targetElement="id95" anim:sub-item="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96" anim:sub-item="" smil:attributeName="visibility" smil:to="visible"/>
                  <anim:animate smil:dur="1s" smil:fill="hold" smil:targetElement="id96" anim:sub-item="" smil:attributeName="width" smil:values="0;width" smil:keyTimes="0;1"/>
                  <anim:animate smil:dur="1s" smil:fill="hold" smil:targetElement="id96" anim:sub-item="" smil:attributeName="height" smil:values="0;height" smil:keyTimes="0;1"/>
                  <anim:animate smil:dur="1s" smil:fill="hold" smil:targetElement="id96" anim:sub-item="" smil:attributeName="rotate" smil:values="90;0" smil:keyTimes="0;1"/>
                  <anim:transitionFilter smil:dur="1s" smil:targetElement="id96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7" anim:sub-item="" smil:attributeName="visibility" smil:to="visible"/>
                  <anim:transitionFilter smil:dur="1s" smil:targetElement="id97" anim:sub-item="" smil:type="fade" smil:subtype="crossfade"/>
                  <anim:animate smil:dur="1s" smil:fill="hold" smil:targetElement="id97" anim:sub-item="" smil:attributeName="x" smil:values="x;x" smil:keyTimes="0;1"/>
                  <anim:animate smil:dur="1s" smil:fill="hold" smil:targetElement="id97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8" anim:sub-item="" smil:attributeName="visibility" smil:to="visible"/>
                  <anim:transitionFilter smil:dur="1s" smil:targetElement="id98" anim:sub-item="" smil:type="fade" smil:subtype="crossfade"/>
                  <anim:animate smil:dur="1s" smil:fill="hold" smil:targetElement="id98" anim:sub-item="" smil:attributeName="x" smil:values="x;x" smil:keyTimes="0;1"/>
                  <anim:animate smil:dur="1s" smil:fill="hold" smil:targetElement="id98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9" anim:sub-item="" smil:attributeName="visibility" smil:to="visible"/>
                  <anim:transitionFilter smil:dur="1s" smil:targetElement="id99" anim:sub-item="" smil:type="fade" smil:subtype="crossfade"/>
                  <anim:animate smil:dur="1s" smil:fill="hold" smil:targetElement="id99" anim:sub-item="" smil:attributeName="x" smil:values="x;x" smil:keyTimes="0;1"/>
                  <anim:animate smil:dur="1s" smil:fill="hold" smil:targetElement="id99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100" text:id="id100" text:style-name="P1"><text:span text:style-name="T6">Les 4 mains :</text:span></text:p>
            <text:p text:style-name="P6"><text:span text:style-name="T7"/></text:p>
          </draw:text-box>
        </draw:frame>
        <draw:frame draw:name="Tableau 26" draw:style-name="standard" xml:id="id101" draw:id="id101" draw:layer="layout" svg:width="5.064cm" svg:height="5.078cm" svg:x="10.3cm" svg:y="5.525cm">
          <table:table>
            <table:table-column table:style-name="co1"/>
            <table:table-row table:style-name="ro1">
              <table:table-cell table:style-name="ce194">
                <text:p text:style-name="P8"><text:span text:style-name="T8">NORD</text:span></text:p>
              </table:table-cell>
            </table:table-row>
            <table:table-row table:style-name="ro2">
              <table:table-cell table:style-name="ce195">
                <text:p text:style-name="P9"><text:span text:style-name="T9">♠ </text:span><text:span text:style-name="T9">R 7 6</text:span></text:p>
              </table:table-cell>
            </table:table-row>
            <table:table-row table:style-name="ro2">
              <table:table-cell table:style-name="ce196">
                <text:p text:style-name="P9"><text:span text:style-name="T9">♥ </text:span><text:span text:style-name="T9">A D V 2</text:span></text:p>
              </table:table-cell>
            </table:table-row>
            <table:table-row table:style-name="ro2">
              <table:table-cell table:style-name="ce197">
                <text:p text:style-name="P9"><text:span text:style-name="T9">♦ </text:span><text:span text:style-name="T9">A D 6</text:span></text:p>
              </table:table-cell>
            </table:table-row>
            <table:table-row table:style-name="ro3">
              <table:table-cell table:style-name="ce198">
                <text:p text:style-name="P9"><text:span text:style-name="T9">♣ </text:span><text:span text:style-name="T9">A 4 3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name="Tableau 27" draw:style-name="standard" xml:id="id103" draw:id="id103" draw:layer="layout" svg:width="5.599cm" svg:height="5.078cm" svg:x="10.5cm" svg:y="12.325cm">
          <table:table>
            <table:table-column table:style-name="co13"/>
            <table:table-row table:style-name="ro1">
              <table:table-cell table:style-name="ce199">
                <text:p text:style-name="P8"><text:span text:style-name="T8">SUD</text:span></text:p>
              </table:table-cell>
            </table:table-row>
            <table:table-row table:style-name="ro2">
              <table:table-cell table:style-name="ce200">
                <text:p text:style-name="P9"><text:span text:style-name="T9">♠ </text:span><text:span text:style-name="T9">A 2</text:span></text:p>
              </table:table-cell>
            </table:table-row>
            <table:table-row table:style-name="ro2">
              <table:table-cell table:style-name="ce201">
                <text:p text:style-name="P9"><text:span text:style-name="T9">♥ </text:span><text:span text:style-name="T9">R 10 8 5 4</text:span></text:p>
              </table:table-cell>
            </table:table-row>
            <table:table-row table:style-name="ro2">
              <table:table-cell table:style-name="ce202">
                <text:p text:style-name="P9"><text:span text:style-name="T9">♦ </text:span><text:span text:style-name="T9">R V 9</text:span></text:p>
              </table:table-cell>
            </table:table-row>
            <table:table-row table:style-name="ro3">
              <table:table-cell table:style-name="ce203">
                <text:p text:style-name="P9"><text:span text:style-name="T9">♣ </text:span><text:span text:style-name="T9">V 10 9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name="Tableau 9" draw:style-name="standard" xml:id="id102" draw:id="id102" draw:layer="layout" svg:width="5.064cm" svg:height="5.649cm" svg:x="4.499cm" svg:y="9.125cm">
          <table:table>
            <table:table-column table:style-name="co1"/>
            <table:table-row table:style-name="ro9">
              <table:table-cell table:style-name="ce204">
                <text:p text:style-name="P8"><text:span text:style-name="T8">OUEST</text:span></text:p>
              </table:table-cell>
            </table:table-row>
            <table:table-row table:style-name="ro13">
              <table:table-cell table:style-name="ce205">
                <text:p text:style-name="P9"><text:span text:style-name="T9">♠ </text:span><text:span text:style-name="T9">D V 10 8 3</text:span></text:p>
              </table:table-cell>
            </table:table-row>
            <table:table-row table:style-name="ro12">
              <table:table-cell table:style-name="ce206">
                <text:p text:style-name="P9"><text:span text:style-name="T9">♥ </text:span><text:span text:style-name="T9">6 3</text:span></text:p>
              </table:table-cell>
            </table:table-row>
            <table:table-row table:style-name="ro12">
              <table:table-cell table:style-name="ce207">
                <text:p text:style-name="P9"><text:span text:style-name="T9">♦ </text:span><text:span text:style-name="T9">10 8</text:span></text:p>
              </table:table-cell>
            </table:table-row>
            <table:table-row table:style-name="ro12">
              <table:table-cell table:style-name="ce208">
                <text:p text:style-name="P9"><text:span text:style-name="T9">♣ </text:span><text:span text:style-name="T9">8 7 5 2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name="Tableau 10" draw:style-name="standard" xml:id="id104" draw:id="id104" draw:layer="layout" svg:width="5.064cm" svg:height="5.078cm" svg:x="16.7cm" svg:y="9.325cm">
          <table:table>
            <table:table-column table:style-name="co1"/>
            <table:table-row table:style-name="ro1">
              <table:table-cell table:style-name="ce209">
                <text:p text:style-name="P8"><text:span text:style-name="T8">EST</text:span></text:p>
              </table:table-cell>
            </table:table-row>
            <table:table-row table:style-name="ro2">
              <table:table-cell table:style-name="ce210">
                <text:p text:style-name="P9"><text:span text:style-name="T9">♠ </text:span><text:span text:style-name="T9">9 5 4</text:span></text:p>
              </table:table-cell>
            </table:table-row>
            <table:table-row table:style-name="ro2">
              <table:table-cell table:style-name="ce211">
                <text:p text:style-name="P9"><text:span text:style-name="T9">♥ </text:span><text:span text:style-name="T9">9 7</text:span></text:p>
              </table:table-cell>
            </table:table-row>
            <table:table-row table:style-name="ro2">
              <table:table-cell table:style-name="ce212">
                <text:p text:style-name="P9"><text:span text:style-name="T9">♦ </text:span><text:span text:style-name="T9">7 5 4 3 2</text:span></text:p>
              </table:table-cell>
            </table:table-row>
            <table:table-row table:style-name="ro3">
              <table:table-cell table:style-name="ce213">
                <text:p text:style-name="P9"><text:span text:style-name="T9">♣ </text:span><text:span text:style-name="T9">R D 6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name="Espace réservé du pied de page 2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draw:frame draw:name="Tableau 8" draw:style-name="standard" xml:id="id105" draw:id="id105" draw:layer="layout" svg:width="8.399cm" svg:height="1.198cm" svg:x="16.1cm" svg:y="5.525cm">
          <table:table>
            <table:table-column table:style-name="co7"/>
            <table:table-row table:style-name="ro10">
              <table:table-cell table:style-name="ce214">
                <text:p text:style-name="P9"><text:span text:style-name="T8">Contrat 6</text:span><text:span text:style-name="T10">♥; entame D♠</text:span></text:p>
              </table:table-cell>
            </table:table-row>
          </table:table>
          <draw:image xlink:href="Pictures/TablePreview70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  <anim:animate smil:dur="1s" smil:fill="hold" smil:targetElement="id100" anim:sub-item="text" smil:attributeName="x" smil:values="x;x" smil:keyTimes="0;1"/>
                  <anim:animate smil:dur="1s" smil:fill="hold" smil:targetElement="id10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101" anim:sub-item="" smil:attributeName="visibility" smil:to="visible"/>
                  <anim:transitionFilter smil:dur="2s" smil:targetElement="id101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102" anim:sub-item="" smil:attributeName="visibility" smil:to="visible"/>
                  <anim:transitionFilter smil:dur="2s" smil:targetElement="id102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103" anim:sub-item="" smil:attributeName="visibility" smil:to="visible"/>
                  <anim:transitionFilter smil:dur="2s" smil:targetElement="id103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104" anim:sub-item="" smil:attributeName="visibility" smil:to="visible"/>
                  <anim:transitionFilter smil:dur="2s" smil:targetElement="id104" anim:sub-item="" smil:type="pinWheelWipe" smil:subtype="one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5" anim:sub-item="" smil:attributeName="visibility" smil:to="visible"/>
                  <anim:transitionFilter smil:dur="1s" smil:targetElement="id105" anim:sub-item="" smil:type="fade" smil:subtype="crossfade"/>
                  <anim:animate smil:dur="1s" smil:fill="hold" smil:targetElement="id105" anim:sub-item="" smil:attributeName="x" smil:values="x;x" smil:keyTimes="0;1"/>
                  <anim:animate smil:dur="1s" smil:fill="hold" smil:targetElement="id105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106" text:id="id106" text:style-name="P6"><text:span text:style-name="T6">B) Conditions de remise en main :</text:span></text:p>
            <text:p xml:id="id107" text:id="id107" text:style-name="P6"><text:span text:style-name="T6"><text:tab/></text:span><text:span text:style-name="T15">5°) Par un coup à blanc : exemple</text:span></text:p>
            <text:p text:style-name="P6"><text:span text:style-name="T6"/></text:p>
            <text:p text:style-name="P6"><text:span text:style-name="T7"/></text:p>
          </draw:text-box>
        </draw:frame>
        <draw:frame draw:name="Tableau 26" draw:style-name="standard" xml:id="id108" draw:id="id108" draw:layer="layout" svg:width="5.064cm" svg:height="5.078cm" svg:x="2.499cm" svg:y="6.925cm">
          <table:table>
            <table:table-column table:style-name="co1"/>
            <table:table-row table:style-name="ro1">
              <table:table-cell table:style-name="ce215">
                <text:p text:style-name="P8"><text:span text:style-name="T8">NORD</text:span></text:p>
              </table:table-cell>
            </table:table-row>
            <table:table-row table:style-name="ro2">
              <table:table-cell table:style-name="ce216">
                <text:p text:style-name="P9"><text:span text:style-name="T9">♠ </text:span><text:span text:style-name="T9">A 7 2</text:span></text:p>
              </table:table-cell>
            </table:table-row>
            <table:table-row table:style-name="ro2">
              <table:table-cell table:style-name="ce217">
                <text:p text:style-name="P9"><text:span text:style-name="T9">♥ </text:span><text:span text:style-name="T9">R 10 8 3</text:span></text:p>
              </table:table-cell>
            </table:table-row>
            <table:table-row table:style-name="ro2">
              <table:table-cell table:style-name="ce218">
                <text:p text:style-name="P9"><text:span text:style-name="T9">♦ </text:span><text:span text:style-name="T9">6 5 4 2</text:span></text:p>
              </table:table-cell>
            </table:table-row>
            <table:table-row table:style-name="ro3">
              <table:table-cell table:style-name="ce219">
                <text:p text:style-name="P9"><text:span text:style-name="T9">♣ </text:span><text:span text:style-name="T9">A D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name="Tableau 27" draw:style-name="standard" xml:id="id109" draw:id="id109" draw:layer="layout" svg:width="5.799cm" svg:height="5.078cm" svg:x="2.499cm" svg:y="12.925cm">
          <table:table>
            <table:table-column table:style-name="co11"/>
            <table:table-row table:style-name="ro1">
              <table:table-cell table:style-name="ce220">
                <text:p text:style-name="P8"><text:span text:style-name="T8">SUD</text:span></text:p>
              </table:table-cell>
            </table:table-row>
            <table:table-row table:style-name="ro2">
              <table:table-cell table:style-name="ce221">
                <text:p text:style-name="P9"><text:span text:style-name="T9">♠ </text:span><text:span text:style-name="T9">R D 6</text:span></text:p>
              </table:table-cell>
            </table:table-row>
            <table:table-row table:style-name="ro2">
              <table:table-cell table:style-name="ce222">
                <text:p text:style-name="P9"><text:span text:style-name="T9">♥ </text:span><text:span text:style-name="T9">A D V 7 4</text:span></text:p>
              </table:table-cell>
            </table:table-row>
            <table:table-row table:style-name="ro2">
              <table:table-cell table:style-name="ce223">
                <text:p text:style-name="P9"><text:span text:style-name="T9">♦ </text:span><text:span text:style-name="T9">A R V 3</text:span></text:p>
              </table:table-cell>
            </table:table-row>
            <table:table-row table:style-name="ro3">
              <table:table-cell table:style-name="ce224">
                <text:p text:style-name="P9"><text:span text:style-name="T9">♣ </text:span><text:span text:style-name="T9">8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name="Tableau 2" draw:style-name="standard" xml:id="id110" draw:id="id110" draw:layer="layout" svg:width="8.399cm" svg:height="1.198cm" svg:x="9.7cm" svg:y="6.925cm">
          <table:table>
            <table:table-column table:style-name="co7"/>
            <table:table-row table:style-name="ro10">
              <table:table-cell table:style-name="ce225">
                <text:p text:style-name="P9"><text:span text:style-name="T8">Contrat 6</text:span><text:span text:style-name="T10">♥; entame V♠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name="Tableau 5" draw:style-name="standard" xml:id="id111" draw:id="id111" draw:layer="layout" svg:width="8.399cm" svg:height="1.198cm" svg:x="9.7cm" svg:y="9.525cm">
          <table:table>
            <table:table-column table:style-name="co7"/>
            <table:table-row table:style-name="ro10">
              <table:table-cell table:style-name="ce226">
                <text:p text:style-name="P9"><text:span text:style-name="T16">Plan de jeu </text:span><text:span text:style-name="T8">: 2 perdantes à <text:s/></text:span><text:span text:style-name="T10">♦</text:span></text:p>
              </table:table-cell>
            </table:table-row>
          </table:table>
          <draw:image xlink:href="Pictures/TablePreview74.svm" xlink:type="simple" xlink:show="embed" xlink:actuate="onLoad"/>
        </draw:frame>
        <draw:frame draw:name="Tableau 7" draw:style-name="standard" xml:id="id112" draw:id="id112" draw:layer="layout" svg:width="10.399cm" svg:height="5.742cm" svg:x="9.7cm" svg:y="11.925cm">
          <table:table>
            <table:table-column table:style-name="co14"/>
            <table:table-row table:style-name="ro19">
              <table:table-cell table:style-name="ce227">
                <text:p text:style-name="P9"><text:span text:style-name="T16">La solution </text:span><text:span text:style-name="T8">: </text:span></text:p>
                <text:p text:style-name="P9"><text:span text:style-name="T8">On fait tomber les atouts, on élimine les </text:span><text:span text:style-name="T10">♠ </text:span><text:span text:style-name="T12">et les </text:span><text:span text:style-name="T10">♣ </text:span><text:span text:style-name="T11">et</text:span><text:span text:style-name="T10"> </text:span><text:span text:style-name="T12">on joue petit </text:span><text:span text:style-name="T10">♦</text:span><text:span text:style-name="T12"> des 2 mains (</text:span><text:span text:style-name="T11">coup à blanc). L’adversaire en main devra rejouer </text:span><text:span text:style-name="T10">♦</text:span><text:span text:style-name="T11"> permettant de réaliser les 3 </text:span><text:span text:style-name="T10">♦</text:span><text:span text:style-name="T11"> restant ou jouer coupe et défausse.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name="Espace réservé du pied de page 4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  <anim:animate smil:dur="1s" smil:fill="hold" smil:targetElement="id106" anim:sub-item="text" smil:attributeName="x" smil:values="x;x" smil:keyTimes="0;1"/>
                  <anim:animate smil:dur="1s" smil:fill="hold" smil:targetElement="id106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  <anim:animate smil:dur="1s" smil:fill="hold" smil:targetElement="id107" anim:sub-item="text" smil:attributeName="x" smil:values="x;x" smil:keyTimes="0;1"/>
                  <anim:animate smil:dur="1s" smil:fill="hold" smil:targetElement="id10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08" anim:sub-item="" smil:attributeName="visibility" smil:to="visible"/>
                  <anim:animate smil:dur="1s" smil:fill="hold" smil:targetElement="id108" anim:sub-item="" smil:attributeName="width" smil:values="0;width" smil:keyTimes="0;1"/>
                  <anim:animate smil:dur="1s" smil:fill="hold" smil:targetElement="id108" anim:sub-item="" smil:attributeName="height" smil:values="0;height" smil:keyTimes="0;1"/>
                  <anim:animate smil:dur="1s" smil:fill="hold" smil:targetElement="id108" anim:sub-item="" smil:attributeName="rotate" smil:values="90;0" smil:keyTimes="0;1"/>
                  <anim:transitionFilter smil:dur="1s" smil:targetElement="id108" anim:sub-item="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09" anim:sub-item="" smil:attributeName="visibility" smil:to="visible"/>
                  <anim:animate smil:dur="1s" smil:fill="hold" smil:targetElement="id109" anim:sub-item="" smil:attributeName="width" smil:values="0;width" smil:keyTimes="0;1"/>
                  <anim:animate smil:dur="1s" smil:fill="hold" smil:targetElement="id109" anim:sub-item="" smil:attributeName="height" smil:values="0;height" smil:keyTimes="0;1"/>
                  <anim:animate smil:dur="1s" smil:fill="hold" smil:targetElement="id109" anim:sub-item="" smil:attributeName="rotate" smil:values="90;0" smil:keyTimes="0;1"/>
                  <anim:transitionFilter smil:dur="1s" smil:targetElement="id109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0" anim:sub-item="" smil:attributeName="visibility" smil:to="visible"/>
                  <anim:transitionFilter smil:dur="1s" smil:targetElement="id110" anim:sub-item="" smil:type="fade" smil:subtype="crossfade"/>
                  <anim:animate smil:dur="1s" smil:fill="hold" smil:targetElement="id110" anim:sub-item="" smil:attributeName="x" smil:values="x;x" smil:keyTimes="0;1"/>
                  <anim:animate smil:dur="1s" smil:fill="hold" smil:targetElement="id110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1" anim:sub-item="" smil:attributeName="visibility" smil:to="visible"/>
                  <anim:transitionFilter smil:dur="1s" smil:targetElement="id111" anim:sub-item="" smil:type="fade" smil:subtype="crossfade"/>
                  <anim:animate smil:dur="1s" smil:fill="hold" smil:targetElement="id111" anim:sub-item="" smil:attributeName="x" smil:values="x;x" smil:keyTimes="0;1"/>
                  <anim:animate smil:dur="1s" smil:fill="hold" smil:targetElement="id111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2" anim:sub-item="" smil:attributeName="visibility" smil:to="visible"/>
                  <anim:transitionFilter smil:dur="1s" smil:targetElement="id112" anim:sub-item="" smil:type="fade" smil:subtype="crossfade"/>
                  <anim:animate smil:dur="1s" smil:fill="hold" smil:targetElement="id112" anim:sub-item="" smil:attributeName="x" smil:values="x;x" smil:keyTimes="0;1"/>
                  <anim:animate smil:dur="1s" smil:fill="hold" smil:targetElement="id112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113" text:id="id113" text:style-name="P1"><text:span text:style-name="T6">Les 4 mains :</text:span></text:p>
            <text:p text:style-name="P6"><text:span text:style-name="T7"/></text:p>
          </draw:text-box>
        </draw:frame>
        <draw:frame draw:name="Tableau 26" draw:style-name="standard" xml:id="id114" draw:id="id114" draw:layer="layout" svg:width="5.064cm" svg:height="5.078cm" svg:x="10.3cm" svg:y="5.525cm">
          <table:table>
            <table:table-column table:style-name="co1"/>
            <table:table-row table:style-name="ro1">
              <table:table-cell table:style-name="ce228">
                <text:p text:style-name="P8"><text:span text:style-name="T8">NORD</text:span></text:p>
              </table:table-cell>
            </table:table-row>
            <table:table-row table:style-name="ro2">
              <table:table-cell table:style-name="ce229">
                <text:p text:style-name="P9"><text:span text:style-name="T9">♠ </text:span><text:span text:style-name="T9">A 7 2</text:span></text:p>
              </table:table-cell>
            </table:table-row>
            <table:table-row table:style-name="ro2">
              <table:table-cell table:style-name="ce230">
                <text:p text:style-name="P9"><text:span text:style-name="T9">♥ </text:span><text:span text:style-name="T9">R 10 8 3</text:span></text:p>
              </table:table-cell>
            </table:table-row>
            <table:table-row table:style-name="ro2">
              <table:table-cell table:style-name="ce231">
                <text:p text:style-name="P9"><text:span text:style-name="T9">♦ </text:span><text:span text:style-name="T9">6 5 4 2</text:span></text:p>
              </table:table-cell>
            </table:table-row>
            <table:table-row table:style-name="ro3">
              <table:table-cell table:style-name="ce232">
                <text:p text:style-name="P9"><text:span text:style-name="T9">♣ </text:span><text:span text:style-name="T9">A D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name="Tableau 27" draw:style-name="standard" xml:id="id116" draw:id="id116" draw:layer="layout" svg:width="5.599cm" svg:height="5.078cm" svg:x="10.5cm" svg:y="12.325cm">
          <table:table>
            <table:table-column table:style-name="co13"/>
            <table:table-row table:style-name="ro1">
              <table:table-cell table:style-name="ce233">
                <text:p text:style-name="P8"><text:span text:style-name="T8">SUD</text:span></text:p>
              </table:table-cell>
            </table:table-row>
            <table:table-row table:style-name="ro2">
              <table:table-cell table:style-name="ce234">
                <text:p text:style-name="P9"><text:span text:style-name="T9">♠ </text:span><text:span text:style-name="T9">R D 6</text:span></text:p>
              </table:table-cell>
            </table:table-row>
            <table:table-row table:style-name="ro2">
              <table:table-cell table:style-name="ce235">
                <text:p text:style-name="P9"><text:span text:style-name="T9">♥ </text:span><text:span text:style-name="T9">A D V 7 4</text:span></text:p>
              </table:table-cell>
            </table:table-row>
            <table:table-row table:style-name="ro2">
              <table:table-cell table:style-name="ce236">
                <text:p text:style-name="P9"><text:span text:style-name="T9">♦ </text:span><text:span text:style-name="T9">A R V 3</text:span></text:p>
              </table:table-cell>
            </table:table-row>
            <table:table-row table:style-name="ro3">
              <table:table-cell table:style-name="ce237">
                <text:p text:style-name="P9"><text:span text:style-name="T9">♣ </text:span><text:span text:style-name="T9">8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name="Tableau 9" draw:style-name="standard" xml:id="id115" draw:id="id115" draw:layer="layout" svg:width="5.064cm" svg:height="5.078cm" svg:x="4.499cm" svg:y="9.125cm">
          <table:table>
            <table:table-column table:style-name="co1"/>
            <table:table-row table:style-name="ro1">
              <table:table-cell table:style-name="ce238">
                <text:p text:style-name="P8"><text:span text:style-name="T8">OUEST</text:span></text:p>
              </table:table-cell>
            </table:table-row>
            <table:table-row table:style-name="ro2">
              <table:table-cell table:style-name="ce239">
                <text:p text:style-name="P9"><text:span text:style-name="T9">♠ </text:span><text:span text:style-name="T9">V 10 9 4</text:span></text:p>
              </table:table-cell>
            </table:table-row>
            <table:table-row table:style-name="ro2">
              <table:table-cell table:style-name="ce240">
                <text:p text:style-name="P9"><text:span text:style-name="T9">♥ </text:span><text:span text:style-name="T9">2 </text:span></text:p>
              </table:table-cell>
            </table:table-row>
            <table:table-row table:style-name="ro2">
              <table:table-cell table:style-name="ce241">
                <text:p text:style-name="P9"><text:span text:style-name="T9">♦ </text:span><text:span text:style-name="T9">D 10 9 8</text:span></text:p>
              </table:table-cell>
            </table:table-row>
            <table:table-row table:style-name="ro3">
              <table:table-cell table:style-name="ce242">
                <text:p text:style-name="P9"><text:span text:style-name="T9">♣ </text:span><text:span text:style-name="T9">7 5 3 2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name="Tableau 10" draw:style-name="standard" xml:id="id117" draw:id="id117" draw:layer="layout" svg:width="6.399cm" svg:height="5.698cm" svg:x="16.7cm" svg:y="9.325cm">
          <table:table>
            <table:table-column table:style-name="co15"/>
            <table:table-row table:style-name="ro20">
              <table:table-cell table:style-name="ce243">
                <text:p text:style-name="P8"><text:span text:style-name="T8">EST</text:span></text:p>
              </table:table-cell>
            </table:table-row>
            <table:table-row table:style-name="ro21">
              <table:table-cell table:style-name="ce244">
                <text:p text:style-name="P9"><text:span text:style-name="T9">♠ </text:span><text:span text:style-name="T9">8 5 3</text:span></text:p>
              </table:table-cell>
            </table:table-row>
            <table:table-row table:style-name="ro21">
              <table:table-cell table:style-name="ce245">
                <text:p text:style-name="P9"><text:span text:style-name="T9">♥ </text:span><text:span text:style-name="T9">9 6 5</text:span></text:p>
              </table:table-cell>
            </table:table-row>
            <table:table-row table:style-name="ro21">
              <table:table-cell table:style-name="ce246">
                <text:p text:style-name="P9"><text:span text:style-name="T9">♦ </text:span><text:span text:style-name="T9">7 </text:span></text:p>
              </table:table-cell>
            </table:table-row>
            <table:table-row table:style-name="ro22">
              <table:table-cell table:style-name="ce247">
                <text:p text:style-name="P9"><text:span text:style-name="T9">♣ </text:span><text:span text:style-name="T9">R V 10 9 6 4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name="Espace réservé du pied de page 2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draw:frame draw:name="Tableau 8" draw:style-name="standard" xml:id="id118" draw:id="id118" draw:layer="layout" svg:width="8.399cm" svg:height="1.198cm" svg:x="16.1cm" svg:y="5.525cm">
          <table:table>
            <table:table-column table:style-name="co7"/>
            <table:table-row table:style-name="ro10">
              <table:table-cell table:style-name="ce248">
                <text:p text:style-name="P9"><text:span text:style-name="T8">Contrat 6</text:span><text:span text:style-name="T10">♥; entame V♠</text:span></text:p>
              </table:table-cell>
            </table:table-row>
          </table:table>
          <draw:image xlink:href="Pictures/TablePreview80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  <anim:animate smil:dur="1s" smil:fill="hold" smil:targetElement="id113" anim:sub-item="text" smil:attributeName="x" smil:values="x;x" smil:keyTimes="0;1"/>
                  <anim:animate smil:dur="1s" smil:fill="hold" smil:targetElement="id11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114" anim:sub-item="" smil:attributeName="visibility" smil:to="visible"/>
                  <anim:transitionFilter smil:dur="2s" smil:targetElement="id114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115" anim:sub-item="" smil:attributeName="visibility" smil:to="visible"/>
                  <anim:transitionFilter smil:dur="2s" smil:targetElement="id115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116" anim:sub-item="" smil:attributeName="visibility" smil:to="visible"/>
                  <anim:transitionFilter smil:dur="2s" smil:targetElement="id116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117" anim:sub-item="" smil:attributeName="visibility" smil:to="visible"/>
                  <anim:transitionFilter smil:dur="2s" smil:targetElement="id117" anim:sub-item="" smil:type="pinWheelWipe" smil:subtype="one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8" anim:sub-item="" smil:attributeName="visibility" smil:to="visible"/>
                  <anim:transitionFilter smil:dur="1s" smil:targetElement="id118" anim:sub-item="" smil:type="fade" smil:subtype="crossfade"/>
                  <anim:animate smil:dur="1s" smil:fill="hold" smil:targetElement="id118" anim:sub-item="" smil:attributeName="x" smil:values="x;x" smil:keyTimes="0;1"/>
                  <anim:animate smil:dur="1s" smil:fill="hold" smil:targetElement="id118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119" text:id="id119" text:style-name="P6"><text:span text:style-name="T6">B) Conditions de remise en main :</text:span></text:p>
            <text:p xml:id="id120" text:id="id120" text:style-name="P6"><text:span text:style-name="T6"><text:tab/></text:span><text:span text:style-name="T15">6°) Dans une couleur bloquée chez l’adversaire :</text:span></text:p>
            <text:p text:style-name="P6"><text:span text:style-name="T6"/></text:p>
            <text:p text:style-name="P6"><text:span text:style-name="T7"/></text:p>
          </draw:text-box>
        </draw:frame>
        <draw:frame draw:name="Tableau 26" draw:style-name="standard" xml:id="id121" draw:id="id121" draw:layer="layout" svg:width="5.064cm" svg:height="5.649cm" svg:x="2.499cm" svg:y="6.925cm">
          <table:table>
            <table:table-column table:style-name="co1"/>
            <table:table-row table:style-name="ro9">
              <table:table-cell table:style-name="ce249">
                <text:p text:style-name="P8"><text:span text:style-name="T8">NORD</text:span></text:p>
              </table:table-cell>
            </table:table-row>
            <table:table-row table:style-name="ro12">
              <table:table-cell table:style-name="ce250">
                <text:p text:style-name="P9"><text:span text:style-name="T9">♠ </text:span><text:span text:style-name="T9">A 3</text:span></text:p>
              </table:table-cell>
            </table:table-row>
            <table:table-row table:style-name="ro12">
              <table:table-cell table:style-name="ce251">
                <text:p text:style-name="P9"><text:span text:style-name="T9">♥ </text:span><text:span text:style-name="T9">8</text:span></text:p>
              </table:table-cell>
            </table:table-row>
            <table:table-row table:style-name="ro13">
              <table:table-cell table:style-name="ce252">
                <text:p text:style-name="P9"><text:span text:style-name="T9">♦ </text:span><text:span text:style-name="T9">D V 10 7 4</text:span></text:p>
              </table:table-cell>
            </table:table-row>
            <table:table-row table:style-name="ro12">
              <table:table-cell table:style-name="ce253">
                <text:p text:style-name="P9"><text:span text:style-name="T9">♣ </text:span><text:span text:style-name="T9">V 6 4 3 2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name="Tableau 27" draw:style-name="standard" xml:id="id122" draw:id="id122" draw:layer="layout" svg:width="5.799cm" svg:height="5.078cm" svg:x="2.499cm" svg:y="12.925cm">
          <table:table>
            <table:table-column table:style-name="co11"/>
            <table:table-row table:style-name="ro1">
              <table:table-cell table:style-name="ce254">
                <text:p text:style-name="P8"><text:span text:style-name="T8">SUD</text:span></text:p>
              </table:table-cell>
            </table:table-row>
            <table:table-row table:style-name="ro2">
              <table:table-cell table:style-name="ce255">
                <text:p text:style-name="P9"><text:span text:style-name="T9">♠ </text:span><text:span text:style-name="T9">6</text:span></text:p>
              </table:table-cell>
            </table:table-row>
            <table:table-row table:style-name="ro2">
              <table:table-cell table:style-name="ce256">
                <text:p text:style-name="P9"><text:span text:style-name="T9">♥ </text:span><text:span text:style-name="T9">A R D</text:span></text:p>
              </table:table-cell>
            </table:table-row>
            <table:table-row table:style-name="ro2">
              <table:table-cell table:style-name="ce257">
                <text:p text:style-name="P9"><text:span text:style-name="T9">♦ </text:span><text:span text:style-name="T9">A R 9 6 5 2</text:span></text:p>
              </table:table-cell>
            </table:table-row>
            <table:table-row table:style-name="ro3">
              <table:table-cell table:style-name="ce258">
                <text:p text:style-name="P9"><text:span text:style-name="T9">♣ </text:span><text:span text:style-name="T9">A 7 5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name="Tableau 2" draw:style-name="standard" xml:id="id123" draw:id="id123" draw:layer="layout" svg:width="8.399cm" svg:height="1.198cm" svg:x="9.7cm" svg:y="6.925cm">
          <table:table>
            <table:table-column table:style-name="co7"/>
            <table:table-row table:style-name="ro10">
              <table:table-cell table:style-name="ce259">
                <text:p text:style-name="P9"><text:span text:style-name="T8">Contrat 6</text:span><text:span text:style-name="T10">♦; </text:span><text:span text:style-name="T11">entame D ♠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name="Tableau 5" draw:style-name="standard" xml:id="id124" draw:id="id124" draw:layer="layout" svg:width="9.399cm" svg:height="4.198cm" svg:x="9.7cm" svg:y="8.525cm">
          <table:table>
            <table:table-column table:style-name="co16"/>
            <table:table-row table:style-name="ro23">
              <table:table-cell table:style-name="ce260">
                <text:p text:style-name="P9"><text:span text:style-name="T16">Plan de jeu </text:span><text:span text:style-name="T8">: 2 perdantes à <text:s/></text:span><text:span text:style-name="T10">♣</text:span></text:p>
                <text:p text:style-name="P9"><text:span text:style-name="T11">Si les </text:span><text:span text:style-name="T10">♣</text:span><text:span text:style-name="T11"> sont 3/2 ils peuvent être bloqués si l’on tire l’AS </text:span><text:span text:style-name="T10">♣</text:span><text:span text:style-name="T11"> pour éviter le déblocage</text:span></text:p>
                <text:p text:style-name="P9"><text:span text:style-name="T12"/></text:p>
              </table:table-cell>
            </table:table-row>
          </table:table>
          <draw:image xlink:href="Pictures/TablePreview84.svm" xlink:type="simple" xlink:show="embed" xlink:actuate="onLoad"/>
        </draw:frame>
        <draw:frame draw:name="Tableau 7" draw:style-name="standard" xml:id="id125" draw:id="id125" draw:layer="layout" svg:width="11.999cm" svg:height="3.462cm" svg:x="9.7cm" svg:y="13.462cm">
          <table:table>
            <table:table-column table:style-name="co17"/>
            <table:table-row table:style-name="ro24">
              <table:table-cell table:style-name="ce261">
                <text:p text:style-name="P9"><text:span text:style-name="T16">La solution </text:span><text:span text:style-name="T8">: </text:span></text:p>
                <text:p text:style-name="P9"><text:span text:style-name="T8">Après l’AS </text:span><text:span text:style-name="T10">♣</text:span><text:span text:style-name="T12"> <text:s/>on tire les atouts puis <text:s/>A R D ♥ et ♠ coupé avant de rendre la main à </text:span><text:span text:style-name="T10">♣. </text:span></text:p>
                <text:p text:style-name="P9"><text:span text:style-name="T11">I</text:span><text:span text:style-name="T12">l nous rejouera en coupe et défausse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name="Espace réservé du pied de page 4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9" anim:sub-item="text" smil:attributeName="visibility" smil:to="visible"/>
                  <anim:transitionFilter smil:dur="1s" smil:targetElement="id119" anim:sub-item="text" smil:type="fade" smil:subtype="crossfade"/>
                  <anim:animate smil:dur="1s" smil:fill="hold" smil:targetElement="id119" anim:sub-item="text" smil:attributeName="x" smil:values="x;x" smil:keyTimes="0;1"/>
                  <anim:animate smil:dur="1s" smil:fill="hold" smil:targetElement="id11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0" anim:sub-item="text" smil:attributeName="visibility" smil:to="visible"/>
                  <anim:transitionFilter smil:dur="1s" smil:targetElement="id120" anim:sub-item="text" smil:type="fade" smil:subtype="crossfade"/>
                  <anim:animate smil:dur="1s" smil:fill="hold" smil:targetElement="id120" anim:sub-item="text" smil:attributeName="x" smil:values="x;x" smil:keyTimes="0;1"/>
                  <anim:animate smil:dur="1s" smil:fill="hold" smil:targetElement="id12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21" anim:sub-item="" smil:attributeName="visibility" smil:to="visible"/>
                  <anim:animate smil:dur="1s" smil:fill="hold" smil:targetElement="id121" anim:sub-item="" smil:attributeName="width" smil:values="0;width" smil:keyTimes="0;1"/>
                  <anim:animate smil:dur="1s" smil:fill="hold" smil:targetElement="id121" anim:sub-item="" smil:attributeName="height" smil:values="0;height" smil:keyTimes="0;1"/>
                  <anim:animate smil:dur="1s" smil:fill="hold" smil:targetElement="id121" anim:sub-item="" smil:attributeName="rotate" smil:values="90;0" smil:keyTimes="0;1"/>
                  <anim:transitionFilter smil:dur="1s" smil:targetElement="id121" anim:sub-item="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22" anim:sub-item="" smil:attributeName="visibility" smil:to="visible"/>
                  <anim:animate smil:dur="1s" smil:fill="hold" smil:targetElement="id122" anim:sub-item="" smil:attributeName="width" smil:values="0;width" smil:keyTimes="0;1"/>
                  <anim:animate smil:dur="1s" smil:fill="hold" smil:targetElement="id122" anim:sub-item="" smil:attributeName="height" smil:values="0;height" smil:keyTimes="0;1"/>
                  <anim:animate smil:dur="1s" smil:fill="hold" smil:targetElement="id122" anim:sub-item="" smil:attributeName="rotate" smil:values="90;0" smil:keyTimes="0;1"/>
                  <anim:transitionFilter smil:dur="1s" smil:targetElement="id12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3" anim:sub-item="" smil:attributeName="visibility" smil:to="visible"/>
                  <anim:transitionFilter smil:dur="1s" smil:targetElement="id123" anim:sub-item="" smil:type="fade" smil:subtype="crossfade"/>
                  <anim:animate smil:dur="1s" smil:fill="hold" smil:targetElement="id123" anim:sub-item="" smil:attributeName="x" smil:values="x;x" smil:keyTimes="0;1"/>
                  <anim:animate smil:dur="1s" smil:fill="hold" smil:targetElement="id123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4" anim:sub-item="" smil:attributeName="visibility" smil:to="visible"/>
                  <anim:transitionFilter smil:dur="1s" smil:targetElement="id124" anim:sub-item="" smil:type="fade" smil:subtype="crossfade"/>
                  <anim:animate smil:dur="1s" smil:fill="hold" smil:targetElement="id124" anim:sub-item="" smil:attributeName="x" smil:values="x;x" smil:keyTimes="0;1"/>
                  <anim:animate smil:dur="1s" smil:fill="hold" smil:targetElement="id124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5" anim:sub-item="" smil:attributeName="visibility" smil:to="visible"/>
                  <anim:transitionFilter smil:dur="1s" smil:targetElement="id125" anim:sub-item="" smil:type="fade" smil:subtype="crossfade"/>
                  <anim:animate smil:dur="1s" smil:fill="hold" smil:targetElement="id125" anim:sub-item="" smil:attributeName="x" smil:values="x;x" smil:keyTimes="0;1"/>
                  <anim:animate smil:dur="1s" smil:fill="hold" smil:targetElement="id125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>
        <draw:frame draw:name="Titre 1" presentation:style-name="pr1" draw:text-style-name="P2" draw:layer="layout" svg:width="21.401cm" svg:height="2.999cm" svg:x="2.299cm" svg:y="0.724cm" presentation:class="title" presentation:user-transformed="true">
          <draw:text-box>
            <text:p text:style-name="P1"><text:span text:style-name="T1">Elimination placement de main</text:span></text:p>
          </draw:text-box>
        </draw:frame>
        <draw:frame draw:name="Sous-titre 3" presentation:style-name="pr2" draw:text-style-name="P2" draw:layer="layout" svg:width="24.002cm" svg:height="14.001cm" svg:x="0.899cm" svg:y="3.762cm" presentation:class="subtitle" presentation:user-transformed="true">
          <draw:text-box>
            <text:p xml:id="id126" text:id="id126" text:style-name="P1"><text:span text:style-name="T6">Les 4 mains :</text:span></text:p>
            <text:p text:style-name="P6"><text:span text:style-name="T7"/></text:p>
          </draw:text-box>
        </draw:frame>
        <draw:frame draw:name="Tableau 26" draw:style-name="standard" xml:id="id127" draw:id="id127" draw:layer="layout" svg:width="5.064cm" svg:height="5.649cm" svg:x="10.3cm" svg:y="5.525cm">
          <table:table>
            <table:table-column table:style-name="co1"/>
            <table:table-row table:style-name="ro9">
              <table:table-cell table:style-name="ce262">
                <text:p text:style-name="P8"><text:span text:style-name="T8">NORD</text:span></text:p>
              </table:table-cell>
            </table:table-row>
            <table:table-row table:style-name="ro12">
              <table:table-cell table:style-name="ce263">
                <text:p text:style-name="P9"><text:span text:style-name="T9">♠ </text:span><text:span text:style-name="T9">A 3</text:span></text:p>
              </table:table-cell>
            </table:table-row>
            <table:table-row table:style-name="ro12">
              <table:table-cell table:style-name="ce264">
                <text:p text:style-name="P9"><text:span text:style-name="T9">♥ </text:span><text:span text:style-name="T9">8</text:span></text:p>
              </table:table-cell>
            </table:table-row>
            <table:table-row table:style-name="ro13">
              <table:table-cell table:style-name="ce265">
                <text:p text:style-name="P9"><text:span text:style-name="T9">♦ </text:span><text:span text:style-name="T9">D V 10 7 4</text:span></text:p>
              </table:table-cell>
            </table:table-row>
            <table:table-row table:style-name="ro12">
              <table:table-cell table:style-name="ce266">
                <text:p text:style-name="P9"><text:span text:style-name="T9">♣ </text:span><text:span text:style-name="T9">V 6 4 3 2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name="Tableau 27" draw:style-name="standard" xml:id="id129" draw:id="id129" draw:layer="layout" svg:width="5.599cm" svg:height="5.078cm" svg:x="10.5cm" svg:y="12.325cm">
          <table:table>
            <table:table-column table:style-name="co13"/>
            <table:table-row table:style-name="ro1">
              <table:table-cell table:style-name="ce267">
                <text:p text:style-name="P8"><text:span text:style-name="T8">SUD</text:span></text:p>
              </table:table-cell>
            </table:table-row>
            <table:table-row table:style-name="ro2">
              <table:table-cell table:style-name="ce268">
                <text:p text:style-name="P9"><text:span text:style-name="T9">♠ </text:span><text:span text:style-name="T9">6</text:span></text:p>
              </table:table-cell>
            </table:table-row>
            <table:table-row table:style-name="ro2">
              <table:table-cell table:style-name="ce269">
                <text:p text:style-name="P9"><text:span text:style-name="T9">♥ </text:span><text:span text:style-name="T9">A R D</text:span></text:p>
              </table:table-cell>
            </table:table-row>
            <table:table-row table:style-name="ro2">
              <table:table-cell table:style-name="ce270">
                <text:p text:style-name="P9"><text:span text:style-name="T9">♦ </text:span><text:span text:style-name="T9">A R 9 6 5 2</text:span></text:p>
              </table:table-cell>
            </table:table-row>
            <table:table-row table:style-name="ro3">
              <table:table-cell table:style-name="ce271">
                <text:p text:style-name="P9"><text:span text:style-name="T9">♣ </text:span><text:span text:style-name="T9">A 7 5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name="Tableau 9" draw:style-name="standard" xml:id="id128" draw:id="id128" draw:layer="layout" svg:width="5.99cm" svg:height="5.329cm" svg:x="3.708cm" svg:y="8.925cm">
          <table:table>
            <table:table-column table:style-name="co18"/>
            <table:table-row table:style-name="ro25">
              <table:table-cell table:style-name="ce272">
                <text:p text:style-name="P8"><text:span text:style-name="T8">OUEST</text:span></text:p>
              </table:table-cell>
            </table:table-row>
            <table:table-row table:style-name="ro26">
              <table:table-cell table:style-name="ce273">
                <text:p text:style-name="P9"><text:span text:style-name="T9">♠ </text:span><text:span text:style-name="T9">D V 10 9 7 2</text:span></text:p>
              </table:table-cell>
            </table:table-row>
            <table:table-row table:style-name="ro25">
              <table:table-cell table:style-name="ce274">
                <text:p text:style-name="P9"><text:span text:style-name="T9">♥ </text:span><text:span text:style-name="T9">10 6 3 2</text:span></text:p>
              </table:table-cell>
            </table:table-row>
            <table:table-row table:style-name="ro25">
              <table:table-cell table:style-name="ce275">
                <text:p text:style-name="P9"><text:span text:style-name="T9">♦ </text:span><text:span text:style-name="T9">8</text:span></text:p>
              </table:table-cell>
            </table:table-row>
            <table:table-row table:style-name="ro27">
              <table:table-cell table:style-name="ce276">
                <text:p text:style-name="P9"><text:span text:style-name="T9">♣ </text:span><text:span text:style-name="T9">D 9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name="Tableau 10" draw:style-name="standard" xml:id="id130" draw:id="id130" draw:layer="layout" svg:width="6.399cm" svg:height="5.698cm" svg:x="16.7cm" svg:y="9.325cm">
          <table:table>
            <table:table-column table:style-name="co15"/>
            <table:table-row table:style-name="ro20">
              <table:table-cell table:style-name="ce277">
                <text:p text:style-name="P8"><text:span text:style-name="T8">EST</text:span></text:p>
              </table:table-cell>
            </table:table-row>
            <table:table-row table:style-name="ro21">
              <table:table-cell table:style-name="ce278">
                <text:p text:style-name="P9"><text:span text:style-name="T9">♠ </text:span><text:span text:style-name="T9">R 8 5 4</text:span></text:p>
              </table:table-cell>
            </table:table-row>
            <table:table-row table:style-name="ro21">
              <table:table-cell table:style-name="ce279">
                <text:p text:style-name="P9"><text:span text:style-name="T9">♥ </text:span><text:span text:style-name="T9">V 9 7 5 4</text:span></text:p>
              </table:table-cell>
            </table:table-row>
            <table:table-row table:style-name="ro21">
              <table:table-cell table:style-name="ce280">
                <text:p text:style-name="P9"><text:span text:style-name="T9">♦ </text:span><text:span text:style-name="T9">3</text:span></text:p>
              </table:table-cell>
            </table:table-row>
            <table:table-row table:style-name="ro22">
              <table:table-cell table:style-name="ce281">
                <text:p text:style-name="P9"><text:span text:style-name="T9">♣ </text:span><text:span text:style-name="T9">R 10 8 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name="Espace réservé du pied de page 2" presentation:style-name="pr3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draw:frame draw:name="Tableau 8" draw:style-name="standard" xml:id="id131" draw:id="id131" draw:layer="layout" svg:width="7.799cm" svg:height="1.198cm" svg:x="16.3cm" svg:y="5.525cm">
          <table:table>
            <table:table-column table:style-name="co19"/>
            <table:table-row table:style-name="ro10">
              <table:table-cell table:style-name="ce282">
                <text:p text:style-name="P9"><text:span text:style-name="T8">Contrat 6</text:span><text:span text:style-name="T10">♦; </text:span><text:span text:style-name="T11">entame D ♠</text:span></text:p>
              </table:table-cell>
            </table:table-row>
          </table:table>
          <draw:image xlink:href="Pictures/TablePreview90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6" anim:sub-item="text" smil:attributeName="visibility" smil:to="visible"/>
                  <anim:transitionFilter smil:dur="1s" smil:targetElement="id126" anim:sub-item="text" smil:type="fade" smil:subtype="crossfade"/>
                  <anim:animate smil:dur="1s" smil:fill="hold" smil:targetElement="id126" anim:sub-item="text" smil:attributeName="x" smil:values="x;x" smil:keyTimes="0;1"/>
                  <anim:animate smil:dur="1s" smil:fill="hold" smil:targetElement="id126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127" anim:sub-item="" smil:attributeName="visibility" smil:to="visible"/>
                  <anim:transitionFilter smil:dur="2s" smil:targetElement="id127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128" anim:sub-item="" smil:attributeName="visibility" smil:to="visible"/>
                  <anim:transitionFilter smil:dur="2s" smil:targetElement="id128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129" anim:sub-item="" smil:attributeName="visibility" smil:to="visible"/>
                  <anim:transitionFilter smil:dur="2s" smil:targetElement="id129" anim:sub-item="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130" anim:sub-item="" smil:attributeName="visibility" smil:to="visible"/>
                  <anim:transitionFilter smil:dur="2s" smil:targetElement="id130" anim:sub-item="" smil:type="pinWheelWipe" smil:subtype="one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1" anim:sub-item="" smil:attributeName="visibility" smil:to="visible"/>
                  <anim:transitionFilter smil:dur="1s" smil:targetElement="id131" anim:sub-item="" smil:type="fade" smil:subtype="crossfade"/>
                  <anim:animate smil:dur="1s" smil:fill="hold" smil:targetElement="id131" anim:sub-item="" smil:attributeName="x" smil:values="x;x" smil:keyTimes="0;1"/>
                  <anim:animate smil:dur="1s" smil:fill="hold" smil:targetElement="id131" anim:sub-item="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1">
        <draw:frame draw:name="Titre 1" presentation:style-name="pr7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Espace réservé du pied de page 3" presentation:style-name="pr8" draw:text-style-name="P4" draw:layer="layout" svg:width="8.042cm" svg:height="1.013cm" svg:x="8.678cm" svg:y="17.657cm" presentation:class="footer" presentation:user-transformed="true">
          <draw:text-box>
            <text:p text:style-name="P3"><text:span text:style-name="T3">JMH/GM</text:span></text:p>
          </draw:text-box>
        </draw:frame>
        <draw:frame draw:name="Picture 2" draw:style-name="gr3" draw:text-style-name="P11" draw:layer="layout" svg:width="12.976cm" svg:height="8.264cm" svg:x="6.212cm" svg:y="6.598cm">
          <draw:image xlink:href="Pictures/2000002E000032B50000204EF7203B87.wmf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gradien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10-02">02/10/2016</text:date></text:span></text:p>
        </draw:text-box>
      </draw:frame>
      <draw:frame draw:name="Espace réservé du pied de page 4" presentation:style-name="Mpr2" draw:text-style-name="MP7" draw:layer="backgroundobjects" svg:width="8.042cm" svg:height="1.013cm" svg:x="8.678cm" svg:y="17.657cm" presentation:class="footer" presentation:user-transformed="true">
        <draw:text-box>
          <text:p text:style-name="MP5"><text:span text:style-name="MT2">JMH/GM</text:span></text:p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 text:style-name="MP9"><text:span text:style-name="MT3">Septième niveau de plan</text:span></text:p>
                                      <text:list>
                                        <text:list-item>
                                          <text:p text:style-name="MP9"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euvième niveau de plan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10-02">02/10/2016</text:date></text:span></text:p>
        </draw:text-box>
      </draw:frame>
      <draw:frame draw:name="Espace réservé du pied de page 4" presentation:style-name="Mpr7" draw:text-style-name="MP7" draw:layer="backgroundobjects" svg:width="8.042cm" svg:height="1.013cm" svg:x="8.678cm" svg:y="17.657cm" presentation:class="footer" presentation:user-transformed="true">
        <draw:text-box>
          <text:p text:style-name="MP5"><text:span text:style-name="MT2">JMH/GM</text:span></text:p>
        </draw:text-box>
      </draw:frame>
      <draw:frame draw:name="Espace réservé du numéro de diapositiv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220"/>
    <meta:generator>OpenOffice/4.1.2$Win32 OpenOffice.org_project/412m3$Build-9782</meta:generator>
  </office:meta>
</office:document-meta>
</file>